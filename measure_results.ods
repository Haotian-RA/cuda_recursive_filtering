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ph 2<text:span text:style-name="T1">nd</text:span></text:p>
          </table:table-cell>
          <table:table-cell office:value-type="string" calcext:value-type="string">
            <text:p>batch siz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b size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32 x 32</text:p>
          </table:table-cell>
          <table:table-cell office:value-type="float" office:value="6.99454" calcext:value-type="float">
            <text:p>6.99454</text:p>
          </table:table-cell>
          <table:table-cell office:value-type="float" office:value="9.67498" calcext:value-type="float">
            <text:p>9.67498</text:p>
          </table:table-cell>
          <table:table-cell office:value-type="float" office:value="10.6978" calcext:value-type="float">
            <text:p>10.6978</text:p>
          </table:table-cell>
          <table:table-cell office:value-type="float" office:value="12.5953" calcext:value-type="float">
            <text:p>12.5953</text:p>
          </table:table-cell>
          <table:table-cell office:value-type="float" office:value="12.9252" calcext:value-type="float">
            <text:p>12.9252</text:p>
          </table:table-cell>
          <table:table-cell office:value-type="float" office:value="12.9016" calcext:value-type="float">
            <text:p>12.9016</text:p>
          </table:table-cell>
          <table:table-cell office:value-type="float" office:value="13.2748" calcext:value-type="float">
            <text:p>13.2748</text:p>
          </table:table-cell>
          <table:table-cell office:value-type="float" office:value="13.1123" calcext:value-type="float">
            <text:p>13.1123</text:p>
          </table:table-cell>
          <table:table-cell office:value-type="float" office:value="13.4454" calcext:value-type="float">
            <text:p>13.4454</text:p>
          </table:table-cell>
          <table:table-cell office:value-type="float" office:value="13.4209" calcext:value-type="float">
            <text:p>13.4209</text:p>
          </table:table-cell>
        </table:table-row>
        <table:table-row table:style-name="ro2">
          <table:table-cell office:value-type="string" calcext:value-type="string">
            <text:p>32 x 64</text:p>
          </table:table-cell>
          <table:table-cell office:value-type="float" office:value="5.95072" calcext:value-type="float">
            <text:p>5.95072</text:p>
          </table:table-cell>
          <table:table-cell office:value-type="float" office:value="10.2159" calcext:value-type="float">
            <text:p>10.2159</text:p>
          </table:table-cell>
          <table:table-cell office:value-type="float" office:value="14.7977" calcext:value-type="float">
            <text:p>14.7977</text:p>
          </table:table-cell>
          <table:table-cell office:value-type="float" office:value="16.7512" calcext:value-type="float">
            <text:p>16.7512</text:p>
          </table:table-cell>
          <table:table-cell office:value-type="float" office:value="22.5455" calcext:value-type="float">
            <text:p>22.5455</text:p>
          </table:table-cell>
          <table:table-cell office:value-type="float" office:value="26.1592" calcext:value-type="float">
            <text:p>26.1592</text:p>
          </table:table-cell>
          <table:table-cell office:value-type="float" office:value="27.5027" calcext:value-type="float">
            <text:p>27.5027</text:p>
          </table:table-cell>
          <table:table-cell office:value-type="float" office:value="28.5794" calcext:value-type="float">
            <text:p>28.5794</text:p>
          </table:table-cell>
          <table:table-cell office:value-type="float" office:value="29.0368" calcext:value-type="float">
            <text:p>29.0368</text:p>
          </table:table-cell>
          <table:table-cell office:value-type="float" office:value="28.982" calcext:value-type="float">
            <text:p>28.982</text:p>
          </table:table-cell>
        </table:table-row>
        <table:table-row table:style-name="ro2">
          <table:table-cell office:value-type="string" calcext:value-type="string">
            <text:p>32 x 128</text:p>
          </table:table-cell>
          <table:table-cell office:value-type="float" office:value="3.75267" calcext:value-type="float">
            <text:p>3.75267</text:p>
          </table:table-cell>
          <table:table-cell office:value-type="float" office:value="7.39884" calcext:value-type="float">
            <text:p>7.39884</text:p>
          </table:table-cell>
          <table:table-cell office:value-type="float" office:value="13.4215" calcext:value-type="float">
            <text:p>13.4215</text:p>
          </table:table-cell>
          <table:table-cell office:value-type="float" office:value="19.0277" calcext:value-type="float">
            <text:p>19.0277</text:p>
          </table:table-cell>
          <table:table-cell office:value-type="float" office:value="23.3577" calcext:value-type="float">
            <text:p>23.3577</text:p>
          </table:table-cell>
          <table:table-cell office:value-type="float" office:value="24.9498" calcext:value-type="float">
            <text:p>24.9498</text:p>
          </table:table-cell>
          <table:table-cell office:value-type="float" office:value="26.4499" calcext:value-type="float">
            <text:p>26.4499</text:p>
          </table:table-cell>
          <table:table-cell office:value-type="float" office:value="27.8147" calcext:value-type="float">
            <text:p>27.8147</text:p>
          </table:table-cell>
          <table:table-cell office:value-type="float" office:value="28.6368" calcext:value-type="float">
            <text:p>28.6368</text:p>
          </table:table-cell>
          <table:table-cell office:value-type="float" office:value="29.1878" calcext:value-type="float">
            <text:p>29.1878</text:p>
          </table:table-cell>
        </table:table-row>
        <table:table-row table:style-name="ro2">
          <table:table-cell office:value-type="string" calcext:value-type="string">
            <text:p>64 x 64</text:p>
          </table:table-cell>
          <table:table-cell office:value-type="float" office:value="5.74257" calcext:value-type="float">
            <text:p>5.74257</text:p>
          </table:table-cell>
          <table:table-cell office:value-type="float" office:value="11.0017" calcext:value-type="float">
            <text:p>11.0017</text:p>
          </table:table-cell>
          <table:table-cell office:value-type="float" office:value="17.6561" calcext:value-type="float">
            <text:p>17.6561</text:p>
          </table:table-cell>
          <table:table-cell office:value-type="float" office:value="21.5629" calcext:value-type="float">
            <text:p>21.5629</text:p>
          </table:table-cell>
          <table:table-cell office:value-type="float" office:value="25.5936" calcext:value-type="float">
            <text:p>25.5936</text:p>
          </table:table-cell>
          <table:table-cell office:value-type="float" office:value="30.3071" calcext:value-type="float">
            <text:p>30.3071</text:p>
          </table:table-cell>
          <table:table-cell office:value-type="float" office:value="33.1428" calcext:value-type="float">
            <text:p>33.1428</text:p>
          </table:table-cell>
          <table:table-cell office:value-type="float" office:value="34.6078" calcext:value-type="float">
            <text:p>34.6078</text:p>
          </table:table-cell>
          <table:table-cell office:value-type="float" office:value="35.2694" calcext:value-type="float">
            <text:p>35.2694</text:p>
          </table:table-cell>
          <table:table-cell office:value-type="float" office:value="35.6905" calcext:value-type="float">
            <text:p>35.6905</text:p>
          </table:table-cell>
        </table:table-row>
        <table:table-row table:style-name="ro2">
          <table:table-cell table:number-columns-repeated="11"/>
        </table:table-row>
        <table:table-row table:style-name="ro1">
          <table:table-cell office:value-type="string" calcext:value-type="string">
            <text:p>ph 4<text:span text:style-name="T1">th</text:span></text:p>
          </table:table-cell>
          <table:table-cell office:value-type="string" calcext:value-type="string">
            <text:p>batch siz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b size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32 x 32</text:p>
          </table:table-cell>
          <table:table-cell office:value-type="float" office:value="5.18068" calcext:value-type="float">
            <text:p>5.18068</text:p>
          </table:table-cell>
          <table:table-cell office:value-type="float" office:value="7.61678" calcext:value-type="float">
            <text:p>7.61678</text:p>
          </table:table-cell>
          <table:table-cell office:value-type="float" office:value="9.86703" calcext:value-type="float">
            <text:p>9.86703</text:p>
          </table:table-cell>
          <table:table-cell office:value-type="float" office:value="10.0131" calcext:value-type="float">
            <text:p>10.0131</text:p>
          </table:table-cell>
          <table:table-cell office:value-type="float" office:value="11.7938" calcext:value-type="float">
            <text:p>11.7938</text:p>
          </table:table-cell>
          <table:table-cell office:value-type="float" office:value="11.8495" calcext:value-type="float">
            <text:p>11.8495</text:p>
          </table:table-cell>
          <table:table-cell office:value-type="float" office:value="12.2483" calcext:value-type="float">
            <text:p>12.2483</text:p>
          </table:table-cell>
          <table:table-cell office:value-type="float" office:value="12.8163" calcext:value-type="float">
            <text:p>12.8163</text:p>
          </table:table-cell>
          <table:table-cell office:value-type="float" office:value="13.3004" calcext:value-type="float">
            <text:p>13.3004</text:p>
          </table:table-cell>
          <table:table-cell office:value-type="float" office:value="12.8343" calcext:value-type="float">
            <text:p>12.8343</text:p>
          </table:table-cell>
        </table:table-row>
        <table:table-row table:style-name="ro2">
          <table:table-cell office:value-type="string" calcext:value-type="string">
            <text:p>32 x 64</text:p>
          </table:table-cell>
          <table:table-cell office:value-type="float" office:value="4.49394" calcext:value-type="float">
            <text:p>4.49394</text:p>
          </table:table-cell>
          <table:table-cell office:value-type="float" office:value="8.15027" calcext:value-type="float">
            <text:p>8.15027</text:p>
          </table:table-cell>
          <table:table-cell office:value-type="float" office:value="12.2547" calcext:value-type="float">
            <text:p>12.2547</text:p>
          </table:table-cell>
          <table:table-cell office:value-type="float" office:value="14.719" calcext:value-type="float">
            <text:p>14.719</text:p>
          </table:table-cell>
          <table:table-cell office:value-type="float" office:value="20.0568" calcext:value-type="float">
            <text:p>20.0568</text:p>
          </table:table-cell>
          <table:table-cell office:value-type="float" office:value="22.724" calcext:value-type="float">
            <text:p>22.724</text:p>
          </table:table-cell>
          <table:table-cell office:value-type="float" office:value="24.3984" calcext:value-type="float">
            <text:p>24.3984</text:p>
          </table:table-cell>
          <table:table-cell office:value-type="float" office:value="25.4968" calcext:value-type="float">
            <text:p>25.4968</text:p>
          </table:table-cell>
          <table:table-cell office:value-type="float" office:value="25.9946" calcext:value-type="float">
            <text:p>25.9946</text:p>
          </table:table-cell>
          <table:table-cell office:value-type="float" office:value="26.8234" calcext:value-type="float">
            <text:p>26.8234</text:p>
          </table:table-cell>
        </table:table-row>
        <table:table-row table:style-name="ro2">
          <table:table-cell office:value-type="string" calcext:value-type="string">
            <text:p>32 x 128</text:p>
          </table:table-cell>
          <table:table-cell office:value-type="float" office:value="3.05214" calcext:value-type="float">
            <text:p>3.05214</text:p>
          </table:table-cell>
          <table:table-cell office:value-type="float" office:value="5.97189" calcext:value-type="float">
            <text:p>5.97189</text:p>
          </table:table-cell>
          <table:table-cell office:value-type="float" office:value="11.0751" calcext:value-type="float">
            <text:p>11.0751</text:p>
          </table:table-cell>
          <table:table-cell office:value-type="float" office:value="15.9881" calcext:value-type="float">
            <text:p>15.9881</text:p>
          </table:table-cell>
          <table:table-cell office:value-type="float" office:value="19.5771" calcext:value-type="float">
            <text:p>19.5771</text:p>
          </table:table-cell>
          <table:table-cell office:value-type="float" office:value="20.9731" calcext:value-type="float">
            <text:p>20.9731</text:p>
          </table:table-cell>
          <table:table-cell office:value-type="float" office:value="21.7261" calcext:value-type="float">
            <text:p>21.7261</text:p>
          </table:table-cell>
          <table:table-cell office:value-type="float" office:value="23.4036" calcext:value-type="float">
            <text:p>23.4036</text:p>
          </table:table-cell>
          <table:table-cell office:value-type="float" office:value="24.1593" calcext:value-type="float">
            <text:p>24.1593</text:p>
          </table:table-cell>
          <table:table-cell office:value-type="float" office:value="24.6393" calcext:value-type="float">
            <text:p>24.6393</text:p>
          </table:table-cell>
        </table:table-row>
        <table:table-row table:style-name="ro2">
          <table:table-cell office:value-type="string" calcext:value-type="string">
            <text:p>64 x 64</text:p>
          </table:table-cell>
          <table:table-cell office:value-type="float" office:value="4.2838" calcext:value-type="float">
            <text:p>4.2838</text:p>
          </table:table-cell>
          <table:table-cell office:value-type="float" office:value="8.18153" calcext:value-type="float">
            <text:p>8.18153</text:p>
          </table:table-cell>
          <table:table-cell office:value-type="float" office:value="14.0398" calcext:value-type="float">
            <text:p>14.0398</text:p>
          </table:table-cell>
          <table:table-cell office:value-type="float" office:value="17.5054" calcext:value-type="float">
            <text:p>17.5054</text:p>
          </table:table-cell>
          <table:table-cell office:value-type="float" office:value="22.1358" calcext:value-type="float">
            <text:p>22.1358</text:p>
          </table:table-cell>
          <table:table-cell office:value-type="float" office:value="24.7583" calcext:value-type="float">
            <text:p>24.7583</text:p>
          </table:table-cell>
          <table:table-cell office:value-type="float" office:value="27.466" calcext:value-type="float">
            <text:p>27.466</text:p>
          </table:table-cell>
          <table:table-cell office:value-type="float" office:value="28.9782" calcext:value-type="float">
            <text:p>28.9782</text:p>
          </table:table-cell>
          <table:table-cell office:value-type="float" office:value="29.6426" calcext:value-type="float">
            <text:p>29.6426</text:p>
          </table:table-cell>
          <table:table-cell office:value-type="float" office:value="30.227" calcext:value-type="float">
            <text:p>30.227</text:p>
          </table:table-cell>
        </table:table-row>
        <table:table-row table:style-name="ro2">
          <table:table-cell table:number-columns-repeated="11"/>
        </table:table-row>
        <table:table-row table:style-name="ro1">
          <table:table-cell office:value-type="string" calcext:value-type="string">
            <text:p>ph 8<text:span text:style-name="T1">th</text:span></text:p>
          </table:table-cell>
          <table:table-cell office:value-type="string" calcext:value-type="string">
            <text:p>batch siz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b size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32 x 32</text:p>
          </table:table-cell>
          <table:table-cell office:value-type="float" office:value="3.53716" calcext:value-type="float">
            <text:p>3.53716</text:p>
          </table:table-cell>
          <table:table-cell office:value-type="float" office:value="5.50301" calcext:value-type="float">
            <text:p>5.50301</text:p>
          </table:table-cell>
          <table:table-cell office:value-type="float" office:value="7.41609" calcext:value-type="float">
            <text:p>7.41609</text:p>
          </table:table-cell>
          <table:table-cell office:value-type="float" office:value="9.12087" calcext:value-type="float">
            <text:p>9.12087</text:p>
          </table:table-cell>
          <table:table-cell office:value-type="float" office:value="10.5296" calcext:value-type="float">
            <text:p>10.5296</text:p>
          </table:table-cell>
          <table:table-cell office:value-type="float" office:value="10.7866" calcext:value-type="float">
            <text:p>10.7866</text:p>
          </table:table-cell>
          <table:table-cell office:value-type="float" office:value="11.0328" calcext:value-type="float">
            <text:p>11.0328</text:p>
          </table:table-cell>
          <table:table-cell office:value-type="float" office:value="11.4816" calcext:value-type="float">
            <text:p>11.4816</text:p>
          </table:table-cell>
          <table:table-cell office:value-type="float" office:value="11.3659" calcext:value-type="float">
            <text:p>11.3659</text:p>
          </table:table-cell>
          <table:table-cell office:value-type="float" office:value="11.4795" calcext:value-type="float">
            <text:p>11.4795</text:p>
          </table:table-cell>
        </table:table-row>
        <table:table-row table:style-name="ro2">
          <table:table-cell office:value-type="string" calcext:value-type="string">
            <text:p>32 x 64</text:p>
          </table:table-cell>
          <table:table-cell office:value-type="float" office:value="3.06511" calcext:value-type="float">
            <text:p>3.06511</text:p>
          </table:table-cell>
          <table:table-cell office:value-type="float" office:value="5.64257" calcext:value-type="float">
            <text:p>5.64257</text:p>
          </table:table-cell>
          <table:table-cell office:value-type="float" office:value="10.0847" calcext:value-type="float">
            <text:p>10.0847</text:p>
          </table:table-cell>
          <table:table-cell office:value-type="float" office:value="12.9686" calcext:value-type="float">
            <text:p>12.9686</text:p>
          </table:table-cell>
          <table:table-cell office:value-type="float" office:value="16.5019" calcext:value-type="float">
            <text:p>16.5019</text:p>
          </table:table-cell>
          <table:table-cell office:value-type="float" office:value="19.4668" calcext:value-type="float">
            <text:p>19.4668</text:p>
          </table:table-cell>
          <table:table-cell office:value-type="float" office:value="21.2829" calcext:value-type="float">
            <text:p>21.2829</text:p>
          </table:table-cell>
          <table:table-cell office:value-type="float" office:value="23.2909" calcext:value-type="float">
            <text:p>23.2909</text:p>
          </table:table-cell>
          <table:table-cell office:value-type="float" office:value="23.9707" calcext:value-type="float">
            <text:p>23.9707</text:p>
          </table:table-cell>
          <table:table-cell office:value-type="float" office:value="24.542" calcext:value-type="float">
            <text:p>24.542</text:p>
          </table:table-cell>
        </table:table-row>
        <table:table-row table:style-name="ro2">
          <table:table-cell office:value-type="string" calcext:value-type="string">
            <text:p>32 x 128</text:p>
          </table:table-cell>
          <table:table-cell office:value-type="float" office:value="2.23972" calcext:value-type="float">
            <text:p>2.23972</text:p>
          </table:table-cell>
          <table:table-cell office:value-type="float" office:value="4.49754" calcext:value-type="float">
            <text:p>4.49754</text:p>
          </table:table-cell>
          <table:table-cell office:value-type="float" office:value="8.11551" calcext:value-type="float">
            <text:p>8.11551</text:p>
          </table:table-cell>
          <table:table-cell office:value-type="float" office:value="12.8374" calcext:value-type="float">
            <text:p>12.8374</text:p>
          </table:table-cell>
          <table:table-cell office:value-type="float" office:value="15.3559" calcext:value-type="float">
            <text:p>15.3559</text:p>
          </table:table-cell>
          <table:table-cell office:value-type="float" office:value="16.2309" calcext:value-type="float">
            <text:p>16.2309</text:p>
          </table:table-cell>
          <table:table-cell office:value-type="float" office:value="17.2217" calcext:value-type="float">
            <text:p>17.2217</text:p>
          </table:table-cell>
          <table:table-cell office:value-type="float" office:value="18.3361" calcext:value-type="float">
            <text:p>18.3361</text:p>
          </table:table-cell>
          <table:table-cell office:value-type="float" office:value="19.1267" calcext:value-type="float">
            <text:p>19.1267</text:p>
          </table:table-cell>
          <table:table-cell office:value-type="float" office:value="19.4459" calcext:value-type="float">
            <text:p>19.4459</text:p>
          </table:table-cell>
        </table:table-row>
        <table:table-row table:style-name="ro2">
          <table:table-cell office:value-type="string" calcext:value-type="string">
            <text:p>64 x 64</text:p>
          </table:table-cell>
          <table:table-cell office:value-type="float" office:value="2.83499" calcext:value-type="float">
            <text:p>2.83499</text:p>
          </table:table-cell>
          <table:table-cell office:value-type="float" office:value="5.44333" calcext:value-type="float">
            <text:p>5.44333</text:p>
          </table:table-cell>
          <table:table-cell office:value-type="float" office:value="9.70289" calcext:value-type="float">
            <text:p>9.70289</text:p>
          </table:table-cell>
          <table:table-cell office:value-type="float" office:value="13.4295" calcext:value-type="float">
            <text:p>13.4295</text:p>
          </table:table-cell>
          <table:table-cell office:value-type="float" office:value="16.7704" calcext:value-type="float">
            <text:p>16.7704</text:p>
          </table:table-cell>
          <table:table-cell office:value-type="float" office:value="18.3743" calcext:value-type="float">
            <text:p>18.3743</text:p>
          </table:table-cell>
          <table:table-cell office:value-type="float" office:value="20.5176" calcext:value-type="float">
            <text:p>20.5176</text:p>
          </table:table-cell>
          <table:table-cell office:value-type="float" office:value="21.921" calcext:value-type="float">
            <text:p>21.921</text:p>
          </table:table-cell>
          <table:table-cell office:value-type="float" office:value="22.4408" calcext:value-type="float">
            <text:p>22.4408</text:p>
          </table:table-cell>
          <table:table-cell office:value-type="float" office:value="22.9102" calcext:value-type="float">
            <text:p>22.9102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ph 16<text:span text:style-name="T1">th</text:span></text:p>
          </table:table-cell>
          <table:table-cell office:value-type="string" calcext:value-type="string">
            <text:p>batch siz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b size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32 x 32</text:p>
          </table:table-cell>
          <table:table-cell office:value-type="float" office:value="2.1344" calcext:value-type="float">
            <text:p>2.1344</text:p>
          </table:table-cell>
          <table:table-cell office:value-type="float" office:value="3.74817" calcext:value-type="float">
            <text:p>3.74817</text:p>
          </table:table-cell>
          <table:table-cell office:value-type="float" office:value="5.83765" calcext:value-type="float">
            <text:p>5.83765</text:p>
          </table:table-cell>
          <table:table-cell office:value-type="float" office:value="6.71393" calcext:value-type="float">
            <text:p>6.71393</text:p>
          </table:table-cell>
          <table:table-cell office:value-type="float" office:value="8.22931" calcext:value-type="float">
            <text:p>8.22931</text:p>
          </table:table-cell>
          <table:table-cell office:value-type="float" office:value="9.88489" calcext:value-type="float">
            <text:p>9.88489</text:p>
          </table:table-cell>
          <table:table-cell office:value-type="float" office:value="10.944" calcext:value-type="float">
            <text:p>10.944</text:p>
          </table:table-cell>
          <table:table-cell office:value-type="float" office:value="11.4161" calcext:value-type="float">
            <text:p>11.4161</text:p>
          </table:table-cell>
          <table:table-cell office:value-type="float" office:value="11.6998" calcext:value-type="float">
            <text:p>11.6998</text:p>
          </table:table-cell>
          <table:table-cell office:value-type="float" office:value="11.8645" calcext:value-type="float">
            <text:p>11.8645</text:p>
          </table:table-cell>
        </table:table-row>
        <table:table-row table:style-name="ro2">
          <table:table-cell office:value-type="string" calcext:value-type="string">
            <text:p>32 x 64</text:p>
          </table:table-cell>
          <table:table-cell office:value-type="float" office:value="1.92165" calcext:value-type="float">
            <text:p>1.92165</text:p>
          </table:table-cell>
          <table:table-cell office:value-type="float" office:value="3.60462" calcext:value-type="float">
            <text:p>3.60462</text:p>
          </table:table-cell>
          <table:table-cell office:value-type="float" office:value="6.41694" calcext:value-type="float">
            <text:p>6.41694</text:p>
          </table:table-cell>
          <table:table-cell office:value-type="float" office:value="9.48176" calcext:value-type="float">
            <text:p>9.48176</text:p>
          </table:table-cell>
          <table:table-cell office:value-type="float" office:value="11.1318" calcext:value-type="float">
            <text:p>11.1318</text:p>
          </table:table-cell>
          <table:table-cell office:value-type="float" office:value="12.588" calcext:value-type="float">
            <text:p>12.588</text:p>
          </table:table-cell>
          <table:table-cell office:value-type="float" office:value="14.2099" calcext:value-type="float">
            <text:p>14.2099</text:p>
          </table:table-cell>
          <table:table-cell office:value-type="float" office:value="15.173" calcext:value-type="float">
            <text:p>15.173</text:p>
          </table:table-cell>
          <table:table-cell office:value-type="float" office:value="15.6385" calcext:value-type="float">
            <text:p>15.6385</text:p>
          </table:table-cell>
          <table:table-cell office:value-type="float" office:value="15.935" calcext:value-type="float">
            <text:p>15.935</text:p>
          </table:table-cell>
        </table:table-row>
        <table:table-row table:style-name="ro2">
          <table:table-cell office:value-type="string" calcext:value-type="string">
            <text:p>32 x 128</text:p>
          </table:table-cell>
          <table:table-cell office:value-type="float" office:value="1.46604" calcext:value-type="float">
            <text:p>1.46604</text:p>
          </table:table-cell>
          <table:table-cell office:value-type="float" office:value="2.85428" calcext:value-type="float">
            <text:p>2.85428</text:p>
          </table:table-cell>
          <table:table-cell office:value-type="float" office:value="5.93804" calcext:value-type="float">
            <text:p>5.93804</text:p>
          </table:table-cell>
          <table:table-cell office:value-type="float" office:value="9.77846" calcext:value-type="float">
            <text:p>9.77846</text:p>
          </table:table-cell>
          <table:table-cell office:value-type="float" office:value="10.5638" calcext:value-type="float">
            <text:p>10.5638</text:p>
          </table:table-cell>
          <table:table-cell office:value-type="float" office:value="11.1323" calcext:value-type="float">
            <text:p>11.1323</text:p>
          </table:table-cell>
          <table:table-cell office:value-type="float" office:value="11.9136" calcext:value-type="float">
            <text:p>11.9136</text:p>
          </table:table-cell>
          <table:table-cell office:value-type="float" office:value="12.8253" calcext:value-type="float">
            <text:p>12.8253</text:p>
          </table:table-cell>
          <table:table-cell office:value-type="float" office:value="13.3709" calcext:value-type="float">
            <text:p>13.3709</text:p>
          </table:table-cell>
          <table:table-cell office:value-type="float" office:value="13.6913" calcext:value-type="float">
            <text:p>13.6913</text:p>
          </table:table-cell>
        </table:table-row>
        <table:table-row table:style-name="ro2">
          <table:table-cell office:value-type="string" calcext:value-type="string">
            <text:p>64 x 64</text:p>
          </table:table-cell>
          <table:table-cell office:value-type="float" office:value="1.74792" calcext:value-type="float">
            <text:p>1.74792</text:p>
          </table:table-cell>
          <table:table-cell office:value-type="float" office:value="3.70016" calcext:value-type="float">
            <text:p>3.70016</text:p>
          </table:table-cell>
          <table:table-cell office:value-type="float" office:value="6.14148" calcext:value-type="float">
            <text:p>6.14148</text:p>
          </table:table-cell>
          <table:table-cell office:value-type="float" office:value="9.90329" calcext:value-type="float">
            <text:p>9.90329</text:p>
          </table:table-cell>
          <table:table-cell office:value-type="float" office:value="11.2448" calcext:value-type="float">
            <text:p>11.2448</text:p>
          </table:table-cell>
          <table:table-cell office:value-type="float" office:value="12.1908" calcext:value-type="float">
            <text:p>12.1908</text:p>
          </table:table-cell>
          <table:table-cell office:value-type="float" office:value="13.6195" calcext:value-type="float">
            <text:p>13.6195</text:p>
          </table:table-cell>
          <table:table-cell office:value-type="float" office:value="14.5903" calcext:value-type="float">
            <text:p>14.5903</text:p>
          </table:table-cell>
          <table:table-cell office:value-type="float" office:value="15.0681" calcext:value-type="float">
            <text:p>15.0681</text:p>
          </table:table-cell>
          <table:table-cell office:value-type="float" office:value="15.3666" calcext:value-type="float">
            <text:p>15.3666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stcr 2<text:span text:style-name="T1">nd</text:span></text:p>
          </table:table-cell>
          <table:table-cell office:value-type="string" calcext:value-type="string">
            <text:p>batch siz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b size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32 x 32</text:p>
          </table:table-cell>
          <table:table-cell office:value-type="float" office:value="6.80851" calcext:value-type="float">
            <text:p>6.80851</text:p>
          </table:table-cell>
          <table:table-cell office:value-type="float" office:value="9.34648" calcext:value-type="float">
            <text:p>9.34648</text:p>
          </table:table-cell>
          <table:table-cell office:value-type="float" office:value="10.5502" calcext:value-type="float">
            <text:p>10.5502</text:p>
          </table:table-cell>
          <table:table-cell office:value-type="float" office:value="11.6192" calcext:value-type="float">
            <text:p>11.6192</text:p>
          </table:table-cell>
          <table:table-cell office:value-type="float" office:value="12.9795" calcext:value-type="float">
            <text:p>12.9795</text:p>
          </table:table-cell>
          <table:table-cell office:value-type="float" office:value="12.9966" calcext:value-type="float">
            <text:p>12.9966</text:p>
          </table:table-cell>
          <table:table-cell office:value-type="float" office:value="12.9645" calcext:value-type="float">
            <text:p>12.9645</text:p>
          </table:table-cell>
          <table:table-cell office:value-type="float" office:value="13.0245" calcext:value-type="float">
            <text:p>13.0245</text:p>
          </table:table-cell>
          <table:table-cell office:value-type="float" office:value="13.0815" calcext:value-type="float">
            <text:p>13.0815</text:p>
          </table:table-cell>
          <table:table-cell office:value-type="float" office:value="13.2726" calcext:value-type="float">
            <text:p>13.2726</text:p>
          </table:table-cell>
        </table:table-row>
        <table:table-row table:style-name="ro2">
          <table:table-cell office:value-type="string" calcext:value-type="string">
            <text:p>32 x 64</text:p>
          </table:table-cell>
          <table:table-cell office:value-type="float" office:value="5.98971" calcext:value-type="float">
            <text:p>5.98971</text:p>
          </table:table-cell>
          <table:table-cell office:value-type="float" office:value="10.1374" calcext:value-type="float">
            <text:p>10.1374</text:p>
          </table:table-cell>
          <table:table-cell office:value-type="float" office:value="14.7423" calcext:value-type="float">
            <text:p>14.7423</text:p>
          </table:table-cell>
          <table:table-cell office:value-type="float" office:value="16.4895" calcext:value-type="float">
            <text:p>16.4895</text:p>
          </table:table-cell>
          <table:table-cell office:value-type="float" office:value="20.8583" calcext:value-type="float">
            <text:p>20.8583</text:p>
          </table:table-cell>
          <table:table-cell office:value-type="float" office:value="25.2918" calcext:value-type="float">
            <text:p>25.2918</text:p>
          </table:table-cell>
          <table:table-cell office:value-type="float" office:value="27.8223" calcext:value-type="float">
            <text:p>27.8223</text:p>
          </table:table-cell>
          <table:table-cell office:value-type="float" office:value="28.8324" calcext:value-type="float">
            <text:p>28.8324</text:p>
          </table:table-cell>
          <table:table-cell office:value-type="float" office:value="29.2165" calcext:value-type="float">
            <text:p>29.2165</text:p>
          </table:table-cell>
          <table:table-cell office:value-type="float" office:value="29.8278" calcext:value-type="float">
            <text:p>29.8278</text:p>
          </table:table-cell>
        </table:table-row>
        <table:table-row table:style-name="ro2">
          <table:table-cell office:value-type="string" calcext:value-type="string">
            <text:p>32 x 128</text:p>
          </table:table-cell>
          <table:table-cell office:value-type="float" office:value="3.8476" calcext:value-type="float">
            <text:p>3.8476</text:p>
          </table:table-cell>
          <table:table-cell office:value-type="float" office:value="7.53163" calcext:value-type="float">
            <text:p>7.53163</text:p>
          </table:table-cell>
          <table:table-cell office:value-type="float" office:value="13.3544" calcext:value-type="float">
            <text:p>13.3544</text:p>
          </table:table-cell>
          <table:table-cell office:value-type="float" office:value="18.9351" calcext:value-type="float">
            <text:p>18.9351</text:p>
          </table:table-cell>
          <table:table-cell office:value-type="float" office:value="23.3399" calcext:value-type="float">
            <text:p>23.3399</text:p>
          </table:table-cell>
          <table:table-cell office:value-type="float" office:value="25.1291" calcext:value-type="float">
            <text:p>25.1291</text:p>
          </table:table-cell>
          <table:table-cell office:value-type="float" office:value="26.4865" calcext:value-type="float">
            <text:p>26.4865</text:p>
          </table:table-cell>
          <table:table-cell office:value-type="float" office:value="27.7822" calcext:value-type="float">
            <text:p>27.7822</text:p>
          </table:table-cell>
          <table:table-cell office:value-type="float" office:value="28.5396" calcext:value-type="float">
            <text:p>28.5396</text:p>
          </table:table-cell>
          <table:table-cell office:value-type="float" office:value="28.8986" calcext:value-type="float">
            <text:p>28.8986</text:p>
          </table:table-cell>
        </table:table-row>
        <table:table-row table:style-name="ro2">
          <table:table-cell office:value-type="string" calcext:value-type="string">
            <text:p>64 x 64</text:p>
          </table:table-cell>
          <table:table-cell office:value-type="float" office:value="5.67376" calcext:value-type="float">
            <text:p>5.67376</text:p>
          </table:table-cell>
          <table:table-cell office:value-type="float" office:value="10.7717" calcext:value-type="float">
            <text:p>10.7717</text:p>
          </table:table-cell>
          <table:table-cell office:value-type="float" office:value="16.9658" calcext:value-type="float">
            <text:p>16.9658</text:p>
          </table:table-cell>
          <table:table-cell office:value-type="float" office:value="20.7345" calcext:value-type="float">
            <text:p>20.7345</text:p>
          </table:table-cell>
          <table:table-cell office:value-type="float" office:value="24.9583" calcext:value-type="float">
            <text:p>24.9583</text:p>
          </table:table-cell>
          <table:table-cell office:value-type="float" office:value="29.4324" calcext:value-type="float">
            <text:p>29.4324</text:p>
          </table:table-cell>
          <table:table-cell office:value-type="float" office:value="32.2901" calcext:value-type="float">
            <text:p>32.2901</text:p>
          </table:table-cell>
          <table:table-cell office:value-type="float" office:value="33.8005" calcext:value-type="float">
            <text:p>33.8005</text:p>
          </table:table-cell>
          <table:table-cell office:value-type="float" office:value="34.4983" calcext:value-type="float">
            <text:p>34.4983</text:p>
          </table:table-cell>
          <table:table-cell office:value-type="float" office:value="34.9574" calcext:value-type="float">
            <text:p>34.9574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<text:span text:style-name="T3">stcr</text:span> 4<text:span text:style-name="T1">th</text:span></text:p>
          </table:table-cell>
          <table:table-cell office:value-type="string" calcext:value-type="string">
            <text:p>batch siz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b size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32 x 32</text:p>
          </table:table-cell>
          <table:table-cell office:value-type="float" office:value="5.07936" calcext:value-type="float">
            <text:p>5.07936</text:p>
          </table:table-cell>
          <table:table-cell office:value-type="float" office:value="7.40982" calcext:value-type="float">
            <text:p>7.40982</text:p>
          </table:table-cell>
          <table:table-cell office:value-type="float" office:value="9.58644" calcext:value-type="float">
            <text:p>9.58644</text:p>
          </table:table-cell>
          <table:table-cell office:value-type="float" office:value="10.5407" calcext:value-type="float">
            <text:p>10.5407</text:p>
          </table:table-cell>
          <table:table-cell office:value-type="float" office:value="10.998" calcext:value-type="float">
            <text:p>10.998</text:p>
          </table:table-cell>
          <table:table-cell office:value-type="float" office:value="11.3491" calcext:value-type="float">
            <text:p>11.3491</text:p>
          </table:table-cell>
          <table:table-cell office:value-type="float" office:value="11.8835" calcext:value-type="float">
            <text:p>11.8835</text:p>
          </table:table-cell>
          <table:table-cell office:value-type="float" office:value="12.1438" calcext:value-type="float">
            <text:p>12.1438</text:p>
          </table:table-cell>
          <table:table-cell office:value-type="float" office:value="12.232" calcext:value-type="float">
            <text:p>12.232</text:p>
          </table:table-cell>
          <table:table-cell office:value-type="float" office:value="12.6904" calcext:value-type="float">
            <text:p>12.6904</text:p>
          </table:table-cell>
        </table:table-row>
        <table:table-row table:style-name="ro2">
          <table:table-cell office:value-type="string" calcext:value-type="string">
            <text:p>32 x 64</text:p>
          </table:table-cell>
          <table:table-cell office:value-type="float" office:value="4.55313" calcext:value-type="float">
            <text:p>4.55313</text:p>
          </table:table-cell>
          <table:table-cell office:value-type="float" office:value="8.10407" calcext:value-type="float">
            <text:p>8.10407</text:p>
          </table:table-cell>
          <table:table-cell office:value-type="float" office:value="12.0244" calcext:value-type="float">
            <text:p>12.0244</text:p>
          </table:table-cell>
          <table:table-cell office:value-type="float" office:value="14.8578" calcext:value-type="float">
            <text:p>14.8578</text:p>
          </table:table-cell>
          <table:table-cell office:value-type="float" office:value="18.8791" calcext:value-type="float">
            <text:p>18.8791</text:p>
          </table:table-cell>
          <table:table-cell office:value-type="float" office:value="22.2588" calcext:value-type="float">
            <text:p>22.2588</text:p>
          </table:table-cell>
          <table:table-cell office:value-type="float" office:value="24.3657" calcext:value-type="float">
            <text:p>24.3657</text:p>
          </table:table-cell>
          <table:table-cell office:value-type="float" office:value="26.0113" calcext:value-type="float">
            <text:p>26.0113</text:p>
          </table:table-cell>
          <table:table-cell office:value-type="float" office:value="26.6074" calcext:value-type="float">
            <text:p>26.6074</text:p>
          </table:table-cell>
          <table:table-cell office:value-type="float" office:value="27.1883" calcext:value-type="float">
            <text:p>27.1883</text:p>
          </table:table-cell>
        </table:table-row>
        <table:table-row table:style-name="ro2">
          <table:table-cell office:value-type="string" calcext:value-type="string">
            <text:p>32 x 128</text:p>
          </table:table-cell>
          <table:table-cell office:value-type="float" office:value="3.16284" calcext:value-type="float">
            <text:p>3.16284</text:p>
          </table:table-cell>
          <table:table-cell office:value-type="float" office:value="6.16422" calcext:value-type="float">
            <text:p>6.16422</text:p>
          </table:table-cell>
          <table:table-cell office:value-type="float" office:value="11.2726" calcext:value-type="float">
            <text:p>11.2726</text:p>
          </table:table-cell>
          <table:table-cell office:value-type="float" office:value="15.7927" calcext:value-type="float">
            <text:p>15.7927</text:p>
          </table:table-cell>
          <table:table-cell office:value-type="float" office:value="18.539" calcext:value-type="float">
            <text:p>18.539</text:p>
          </table:table-cell>
          <table:table-cell office:value-type="float" office:value="21.121" calcext:value-type="float">
            <text:p>21.121</text:p>
          </table:table-cell>
          <table:table-cell office:value-type="float" office:value="22.4205" calcext:value-type="float">
            <text:p>22.4205</text:p>
          </table:table-cell>
          <table:table-cell office:value-type="float" office:value="23.6907" calcext:value-type="float">
            <text:p>23.6907</text:p>
          </table:table-cell>
          <table:table-cell office:value-type="float" office:value="24.3634" calcext:value-type="float">
            <text:p>24.3634</text:p>
          </table:table-cell>
          <table:table-cell office:value-type="float" office:value="24.676" calcext:value-type="float">
            <text:p>24.676</text:p>
          </table:table-cell>
        </table:table-row>
        <table:table-row table:style-name="ro2">
          <table:table-cell office:value-type="string" calcext:value-type="string">
            <text:p>64 x 64</text:p>
          </table:table-cell>
          <table:table-cell office:value-type="float" office:value="4.38807" calcext:value-type="float">
            <text:p>4.38807</text:p>
          </table:table-cell>
          <table:table-cell office:value-type="float" office:value="8.24286" calcext:value-type="float">
            <text:p>8.24286</text:p>
          </table:table-cell>
          <table:table-cell office:value-type="float" office:value="13.422" calcext:value-type="float">
            <text:p>13.422</text:p>
          </table:table-cell>
          <table:table-cell office:value-type="float" office:value="16.6565" calcext:value-type="float">
            <text:p>16.6565</text:p>
          </table:table-cell>
          <table:table-cell office:value-type="float" office:value="20.7662" calcext:value-type="float">
            <text:p>20.7662</text:p>
          </table:table-cell>
          <table:table-cell office:value-type="float" office:value="23.5753" calcext:value-type="float">
            <text:p>23.5753</text:p>
          </table:table-cell>
          <table:table-cell office:value-type="float" office:value="26.6626" calcext:value-type="float">
            <text:p>26.6626</text:p>
          </table:table-cell>
          <table:table-cell office:value-type="float" office:value="27.8583" calcext:value-type="float">
            <text:p>27.8583</text:p>
          </table:table-cell>
          <table:table-cell office:value-type="float" office:value="28.8048" calcext:value-type="float">
            <text:p>28.8048</text:p>
          </table:table-cell>
          <table:table-cell office:value-type="float" office:value="29.1046" calcext:value-type="float">
            <text:p>29.1046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<text:span text:style-name="T3">stcr</text:span> 8<text:span text:style-name="T1">th</text:span></text:p>
          </table:table-cell>
          <table:table-cell office:value-type="string" calcext:value-type="string">
            <text:p>batch siz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b size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32 x 32</text:p>
          </table:table-cell>
          <table:table-cell office:value-type="float" office:value="3.42246" calcext:value-type="float">
            <text:p>3.42246</text:p>
          </table:table-cell>
          <table:table-cell office:value-type="float" office:value="5.38947" calcext:value-type="float">
            <text:p>5.38947</text:p>
          </table:table-cell>
          <table:table-cell office:value-type="float" office:value="6.8505" calcext:value-type="float">
            <text:p>6.8505</text:p>
          </table:table-cell>
          <table:table-cell office:value-type="float" office:value="8.29095" calcext:value-type="float">
            <text:p>8.29095</text:p>
          </table:table-cell>
          <table:table-cell office:value-type="float" office:value="9.88083" calcext:value-type="float">
            <text:p>9.88083</text:p>
          </table:table-cell>
          <table:table-cell office:value-type="float" office:value="10.5872" calcext:value-type="float">
            <text:p>10.5872</text:p>
          </table:table-cell>
          <table:table-cell office:value-type="float" office:value="10.8695" calcext:value-type="float">
            <text:p>10.8695</text:p>
          </table:table-cell>
          <table:table-cell office:value-type="float" office:value="11.2583" calcext:value-type="float">
            <text:p>11.2583</text:p>
          </table:table-cell>
          <table:table-cell office:value-type="float" office:value="11.2264" calcext:value-type="float">
            <text:p>11.2264</text:p>
          </table:table-cell>
          <table:table-cell office:value-type="float" office:value="11.2553" calcext:value-type="float">
            <text:p>11.2553</text:p>
          </table:table-cell>
        </table:table-row>
        <table:table-row table:style-name="ro2">
          <table:table-cell office:value-type="string" calcext:value-type="string">
            <text:p>32 x 64</text:p>
          </table:table-cell>
          <table:table-cell office:value-type="float" office:value="3.10755" calcext:value-type="float">
            <text:p>3.10755</text:p>
          </table:table-cell>
          <table:table-cell office:value-type="float" office:value="5.75438" calcext:value-type="float">
            <text:p>5.75438</text:p>
          </table:table-cell>
          <table:table-cell office:value-type="float" office:value="9.89946" calcext:value-type="float">
            <text:p>9.89946</text:p>
          </table:table-cell>
          <table:table-cell office:value-type="float" office:value="11.4483" calcext:value-type="float">
            <text:p>11.4483</text:p>
          </table:table-cell>
          <table:table-cell office:value-type="float" office:value="15.7744" calcext:value-type="float">
            <text:p>15.7744</text:p>
          </table:table-cell>
          <table:table-cell office:value-type="float" office:value="18.9104" calcext:value-type="float">
            <text:p>18.9104</text:p>
          </table:table-cell>
          <table:table-cell office:value-type="float" office:value="21.4116" calcext:value-type="float">
            <text:p>21.4116</text:p>
          </table:table-cell>
          <table:table-cell office:value-type="float" office:value="22.5661" calcext:value-type="float">
            <text:p>22.5661</text:p>
          </table:table-cell>
          <table:table-cell office:value-type="float" office:value="23.5022" calcext:value-type="float">
            <text:p>23.5022</text:p>
          </table:table-cell>
          <table:table-cell office:value-type="float" office:value="23.7929" calcext:value-type="float">
            <text:p>23.7929</text:p>
          </table:table-cell>
        </table:table-row>
        <table:table-row table:style-name="ro2">
          <table:table-cell office:value-type="string" calcext:value-type="string">
            <text:p>32 x 128</text:p>
          </table:table-cell>
          <table:table-cell office:value-type="float" office:value="2.3779" calcext:value-type="float">
            <text:p>2.3779</text:p>
          </table:table-cell>
          <table:table-cell office:value-type="float" office:value="4.60597" calcext:value-type="float">
            <text:p>4.60597</text:p>
          </table:table-cell>
          <table:table-cell office:value-type="float" office:value="8.56228" calcext:value-type="float">
            <text:p>8.56228</text:p>
          </table:table-cell>
          <table:table-cell office:value-type="float" office:value="12.8498" calcext:value-type="float">
            <text:p>12.8498</text:p>
          </table:table-cell>
          <table:table-cell office:value-type="float" office:value="15.3293" calcext:value-type="float">
            <text:p>15.3293</text:p>
          </table:table-cell>
          <table:table-cell office:value-type="float" office:value="16.2961" calcext:value-type="float">
            <text:p>16.2961</text:p>
          </table:table-cell>
          <table:table-cell office:value-type="float" office:value="17.6335" calcext:value-type="float">
            <text:p>17.6335</text:p>
          </table:table-cell>
          <table:table-cell office:value-type="float" office:value="18.808" calcext:value-type="float">
            <text:p>18.808</text:p>
          </table:table-cell>
          <table:table-cell office:value-type="float" office:value="19.312" calcext:value-type="float">
            <text:p>19.312</text:p>
          </table:table-cell>
          <table:table-cell office:value-type="float" office:value="19.5954" calcext:value-type="float">
            <text:p>19.5954</text:p>
          </table:table-cell>
        </table:table-row>
        <table:table-row table:style-name="ro2">
          <table:table-cell office:value-type="string" calcext:value-type="string">
            <text:p>64 x 64</text:p>
          </table:table-cell>
          <table:table-cell office:value-type="float" office:value="2.94795" calcext:value-type="float">
            <text:p>2.94795</text:p>
          </table:table-cell>
          <table:table-cell office:value-type="float" office:value="5.54232" calcext:value-type="float">
            <text:p>5.54232</text:p>
          </table:table-cell>
          <table:table-cell office:value-type="float" office:value="9.20377" calcext:value-type="float">
            <text:p>9.20377</text:p>
          </table:table-cell>
          <table:table-cell office:value-type="float" office:value="12.4863" calcext:value-type="float">
            <text:p>12.4863</text:p>
          </table:table-cell>
          <table:table-cell office:value-type="float" office:value="15.4672" calcext:value-type="float">
            <text:p>15.4672</text:p>
          </table:table-cell>
          <table:table-cell office:value-type="float" office:value="17.1207" calcext:value-type="float">
            <text:p>17.1207</text:p>
          </table:table-cell>
          <table:table-cell office:value-type="float" office:value="19.4228" calcext:value-type="float">
            <text:p>19.4228</text:p>
          </table:table-cell>
          <table:table-cell office:value-type="float" office:value="20.6459" calcext:value-type="float">
            <text:p>20.6459</text:p>
          </table:table-cell>
          <table:table-cell office:value-type="float" office:value="21.1849" calcext:value-type="float">
            <text:p>21.1849</text:p>
          </table:table-cell>
          <table:table-cell office:value-type="float" office:value="21.8075" calcext:value-type="float">
            <text:p>21.8075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<text:span text:style-name="T3">stcr</text:span> 16<text:span text:style-name="T1">th</text:span></text:p>
          </table:table-cell>
          <table:table-cell office:value-type="string" calcext:value-type="string">
            <text:p>batch siz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b size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32 x 32</text:p>
          </table:table-cell>
          <table:table-cell office:value-type="float" office:value="2.30058" calcext:value-type="float">
            <text:p>2.30058</text:p>
          </table:table-cell>
          <table:table-cell office:value-type="float" office:value="3.81805" calcext:value-type="float">
            <text:p>3.81805</text:p>
          </table:table-cell>
          <table:table-cell office:value-type="float" office:value="4.97868" calcext:value-type="float">
            <text:p>4.97868</text:p>
          </table:table-cell>
          <table:table-cell office:value-type="float" office:value="6.56958" calcext:value-type="float">
            <text:p>6.56958</text:p>
          </table:table-cell>
          <table:table-cell office:value-type="float" office:value="8.19067" calcext:value-type="float">
            <text:p>8.19067</text:p>
          </table:table-cell>
          <table:table-cell office:value-type="float" office:value="9.78463" calcext:value-type="float">
            <text:p>9.78463</text:p>
          </table:table-cell>
          <table:table-cell office:value-type="float" office:value="10.9792" calcext:value-type="float">
            <text:p>10.9792</text:p>
          </table:table-cell>
          <table:table-cell office:value-type="float" office:value="11.5227" calcext:value-type="float">
            <text:p>11.5227</text:p>
          </table:table-cell>
          <table:table-cell office:value-type="float" office:value="11.8959" calcext:value-type="float">
            <text:p>11.8959</text:p>
          </table:table-cell>
          <table:table-cell office:value-type="float" office:value="11.8983" calcext:value-type="float">
            <text:p>11.8983</text:p>
          </table:table-cell>
        </table:table-row>
        <table:table-row table:style-name="ro2">
          <table:table-cell office:value-type="string" calcext:value-type="string">
            <text:p>32 x 64</text:p>
          </table:table-cell>
          <table:table-cell office:value-type="float" office:value="1.95331" calcext:value-type="float">
            <text:p>1.95331</text:p>
          </table:table-cell>
          <table:table-cell office:value-type="float" office:value="3.66811" calcext:value-type="float">
            <text:p>3.66811</text:p>
          </table:table-cell>
          <table:table-cell office:value-type="float" office:value="6.08654" calcext:value-type="float">
            <text:p>6.08654</text:p>
          </table:table-cell>
          <table:table-cell office:value-type="float" office:value="8.99143" calcext:value-type="float">
            <text:p>8.99143</text:p>
          </table:table-cell>
          <table:table-cell office:value-type="float" office:value="10.8827" calcext:value-type="float">
            <text:p>10.8827</text:p>
          </table:table-cell>
          <table:table-cell office:value-type="float" office:value="12.4174" calcext:value-type="float">
            <text:p>12.4174</text:p>
          </table:table-cell>
          <table:table-cell office:value-type="float" office:value="13.8585" calcext:value-type="float">
            <text:p>13.8585</text:p>
          </table:table-cell>
          <table:table-cell office:value-type="float" office:value="14.8326" calcext:value-type="float">
            <text:p>14.8326</text:p>
          </table:table-cell>
          <table:table-cell office:value-type="float" office:value="15.2734" calcext:value-type="float">
            <text:p>15.2734</text:p>
          </table:table-cell>
          <table:table-cell office:value-type="float" office:value="15.4717" calcext:value-type="float">
            <text:p>15.4717</text:p>
          </table:table-cell>
        </table:table-row>
        <table:table-row table:style-name="ro2">
          <table:table-cell office:value-type="string" calcext:value-type="string">
            <text:p>32 x 128</text:p>
          </table:table-cell>
          <table:table-cell office:value-type="float" office:value="1.63267" calcext:value-type="float">
            <text:p>1.63267</text:p>
          </table:table-cell>
          <table:table-cell office:value-type="float" office:value="3.33464" calcext:value-type="float">
            <text:p>3.33464</text:p>
          </table:table-cell>
          <table:table-cell office:value-type="float" office:value="5.78727" calcext:value-type="float">
            <text:p>5.78727</text:p>
          </table:table-cell>
          <table:table-cell office:value-type="float" office:value="9.47183" calcext:value-type="float">
            <text:p>9.47183</text:p>
          </table:table-cell>
          <table:table-cell office:value-type="float" office:value="10.3502" calcext:value-type="float">
            <text:p>10.3502</text:p>
          </table:table-cell>
          <table:table-cell office:value-type="float" office:value="10.9881" calcext:value-type="float">
            <text:p>10.9881</text:p>
          </table:table-cell>
          <table:table-cell office:value-type="float" office:value="12.1162" calcext:value-type="float">
            <text:p>12.1162</text:p>
          </table:table-cell>
          <table:table-cell office:value-type="float" office:value="12.8163" calcext:value-type="float">
            <text:p>12.8163</text:p>
          </table:table-cell>
          <table:table-cell office:value-type="float" office:value="13.1421" calcext:value-type="float">
            <text:p>13.1421</text:p>
          </table:table-cell>
          <table:table-cell office:value-type="float" office:value="13.3734" calcext:value-type="float">
            <text:p>13.3734</text:p>
          </table:table-cell>
        </table:table-row>
        <table:table-row table:style-name="ro2">
          <table:table-cell office:value-type="string" calcext:value-type="string">
            <text:p>64 x 64</text:p>
          </table:table-cell>
          <table:table-cell office:value-type="float" office:value="1.78099" calcext:value-type="float">
            <text:p>1.78099</text:p>
          </table:table-cell>
          <table:table-cell office:value-type="float" office:value="3.72309" calcext:value-type="float">
            <text:p>3.72309</text:p>
          </table:table-cell>
          <table:table-cell office:value-type="float" office:value="6.32501" calcext:value-type="float">
            <text:p>6.32501</text:p>
          </table:table-cell>
          <table:table-cell office:value-type="float" office:value="8.53834" calcext:value-type="float">
            <text:p>8.53834</text:p>
          </table:table-cell>
          <table:table-cell office:value-type="float" office:value="10.0664" calcext:value-type="float">
            <text:p>10.0664</text:p>
          </table:table-cell>
          <table:table-cell office:value-type="float" office:value="10.9815" calcext:value-type="float">
            <text:p>10.9815</text:p>
          </table:table-cell>
          <table:table-cell office:value-type="float" office:value="12.2068" calcext:value-type="float">
            <text:p>12.2068</text:p>
          </table:table-cell>
          <table:table-cell office:value-type="float" office:value="12.9518" calcext:value-type="float">
            <text:p>12.9518</text:p>
          </table:table-cell>
          <table:table-cell office:value-type="float" office:value="13.4786" calcext:value-type="float">
            <text:p>13.4786</text:p>
          </table:table-cell>
          <table:table-cell office:value-type="float" office:value="13.7304" calcext:value-type="float">
            <text:p>13.7304</text:p>
          </table:table-cell>
        </table:table-row>
        <table:table-row table:style-name="ro2">
          <table:table-cell table:style-name="ce4"/>
          <table:table-cell table:style-name="ce5" table:number-columns-repeated="4"/>
          <table:table-cell table:style-name="ce6" table:number-columns-repeated="6"/>
        </table:table-row>
        <table:table-row table:style-name="ro2">
          <table:table-cell office:value-type="string" calcext:value-type="string">
            <text:p>dtcr 2<text:span text:style-name="T1">nd</text:span></text:p>
          </table:table-cell>
          <table:table-cell office:value-type="string" calcext:value-type="string">
            <text:p>batch siz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b size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32 x 32</text:p>
          </table:table-cell>
          <table:table-cell office:value-type="float" office:value="7.72014" calcext:value-type="float">
            <text:p>7.72014</text:p>
          </table:table-cell>
          <table:table-cell office:value-type="float" office:value="10.0313" calcext:value-type="float">
            <text:p>10.0313</text:p>
          </table:table-cell>
          <table:table-cell office:value-type="float" office:value="10.9589" calcext:value-type="float">
            <text:p>10.9589</text:p>
          </table:table-cell>
          <table:table-cell office:value-type="float" office:value="11.7256" calcext:value-type="float">
            <text:p>11.7256</text:p>
          </table:table-cell>
          <table:table-cell office:value-type="float" office:value="13.7222" calcext:value-type="float">
            <text:p>13.7222</text:p>
          </table:table-cell>
          <table:table-cell office:value-type="float" office:value="14.0039" calcext:value-type="float">
            <text:p>14.0039</text:p>
          </table:table-cell>
          <table:table-cell office:value-type="float" office:value="14.19" calcext:value-type="float">
            <text:p>14.19</text:p>
          </table:table-cell>
          <table:table-cell office:value-type="float" office:value="14.375" calcext:value-type="float">
            <text:p>14.375</text:p>
          </table:table-cell>
          <table:table-cell office:value-type="float" office:value="14.3739" calcext:value-type="float">
            <text:p>14.3739</text:p>
          </table:table-cell>
          <table:table-cell office:value-type="float" office:value="14.5231" calcext:value-type="float">
            <text:p>14.5231</text:p>
          </table:table-cell>
        </table:table-row>
        <table:table-row table:style-name="ro2">
          <table:table-cell office:value-type="string" calcext:value-type="string">
            <text:p>32 x 64</text:p>
          </table:table-cell>
          <table:table-cell office:value-type="float" office:value="8.04842" calcext:value-type="float">
            <text:p>8.04842</text:p>
          </table:table-cell>
          <table:table-cell office:value-type="float" office:value="12.5245" calcext:value-type="float">
            <text:p>12.5245</text:p>
          </table:table-cell>
          <table:table-cell office:value-type="float" office:value="16.1412" calcext:value-type="float">
            <text:p>16.1412</text:p>
          </table:table-cell>
          <table:table-cell office:value-type="float" office:value="17.2915" calcext:value-type="float">
            <text:p>17.2915</text:p>
          </table:table-cell>
          <table:table-cell office:value-type="float" office:value="22.6233" calcext:value-type="float">
            <text:p>22.6233</text:p>
          </table:table-cell>
          <table:table-cell office:value-type="float" office:value="24.3119" calcext:value-type="float">
            <text:p>24.3119</text:p>
          </table:table-cell>
          <table:table-cell office:value-type="float" office:value="25.5957" calcext:value-type="float">
            <text:p>25.5957</text:p>
          </table:table-cell>
          <table:table-cell office:value-type="float" office:value="25.9583" calcext:value-type="float">
            <text:p>25.9583</text:p>
          </table:table-cell>
          <table:table-cell office:value-type="float" office:value="26.8702" calcext:value-type="float">
            <text:p>26.8702</text:p>
          </table:table-cell>
          <table:table-cell office:value-type="float" office:value="26.367" calcext:value-type="float">
            <text:p>26.367</text:p>
          </table:table-cell>
        </table:table-row>
        <table:table-row table:style-name="ro2">
          <table:table-cell office:value-type="string" calcext:value-type="string">
            <text:p>32 x 128</text:p>
          </table:table-cell>
          <table:table-cell office:value-type="float" office:value="6.00437" calcext:value-type="float">
            <text:p>6.00437</text:p>
          </table:table-cell>
          <table:table-cell office:value-type="float" office:value="11.3778" calcext:value-type="float">
            <text:p>11.3778</text:p>
          </table:table-cell>
          <table:table-cell office:value-type="float" office:value="17.7477" calcext:value-type="float">
            <text:p>17.7477</text:p>
          </table:table-cell>
          <table:table-cell office:value-type="float" office:value="22.3674" calcext:value-type="float">
            <text:p>22.3674</text:p>
          </table:table-cell>
          <table:table-cell office:value-type="float" office:value="26.9049" calcext:value-type="float">
            <text:p>26.9049</text:p>
          </table:table-cell>
          <table:table-cell office:value-type="float" office:value="31.0821" calcext:value-type="float">
            <text:p>31.0821</text:p>
          </table:table-cell>
          <table:table-cell office:value-type="float" office:value="33.5482" calcext:value-type="float">
            <text:p>33.5482</text:p>
          </table:table-cell>
          <table:table-cell office:value-type="float" office:value="34.5358" calcext:value-type="float">
            <text:p>34.5358</text:p>
          </table:table-cell>
          <table:table-cell office:value-type="float" office:value="35.3611" calcext:value-type="float">
            <text:p>35.3611</text:p>
          </table:table-cell>
          <table:table-cell office:value-type="float" office:value="35.7528" calcext:value-type="float">
            <text:p>35.7528</text:p>
          </table:table-cell>
        </table:table-row>
        <table:table-row table:style-name="ro2">
          <table:table-cell office:value-type="string" calcext:value-type="string">
            <text:p>64 x 64</text:p>
          </table:table-cell>
          <table:table-cell office:value-type="float" office:value="7.61452" calcext:value-type="float">
            <text:p>7.61452</text:p>
          </table:table-cell>
          <table:table-cell office:value-type="float" office:value="13.5593" calcext:value-type="float">
            <text:p>13.5593</text:p>
          </table:table-cell>
          <table:table-cell office:value-type="float" office:value="19.2192" calcext:value-type="float">
            <text:p>19.2192</text:p>
          </table:table-cell>
          <table:table-cell office:value-type="float" office:value="22.131" calcext:value-type="float">
            <text:p>22.131</text:p>
          </table:table-cell>
          <table:table-cell office:value-type="float" office:value="27.9362" calcext:value-type="float">
            <text:p>27.9362</text:p>
          </table:table-cell>
          <table:table-cell office:value-type="float" office:value="33.209" calcext:value-type="float">
            <text:p>33.209</text:p>
          </table:table-cell>
          <table:table-cell office:value-type="float" office:value="35.7511" calcext:value-type="float">
            <text:p>35.7511</text:p>
          </table:table-cell>
          <table:table-cell office:value-type="float" office:value="37.3188" calcext:value-type="float">
            <text:p>37.3188</text:p>
          </table:table-cell>
          <table:table-cell office:value-type="float" office:value="37.9294" calcext:value-type="float">
            <text:p>37.9294</text:p>
          </table:table-cell>
          <table:table-cell office:value-type="float" office:value="38.371" calcext:value-type="float">
            <text:p>38.371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<text:span text:style-name="T3">dtcr</text:span> 4<text:span text:style-name="T1">th</text:span></text:p>
          </table:table-cell>
          <table:table-cell office:value-type="string" calcext:value-type="string">
            <text:p>batch siz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b size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32 x 32</text:p>
          </table:table-cell>
          <table:table-cell office:value-type="float" office:value="5.86887" calcext:value-type="float">
            <text:p>5.86887</text:p>
          </table:table-cell>
          <table:table-cell office:value-type="float" office:value="7.94045" calcext:value-type="float">
            <text:p>7.94045</text:p>
          </table:table-cell>
          <table:table-cell office:value-type="float" office:value="9.79717" calcext:value-type="float">
            <text:p>9.79717</text:p>
          </table:table-cell>
          <table:table-cell office:value-type="float" office:value="11.1769" calcext:value-type="float">
            <text:p>11.1769</text:p>
          </table:table-cell>
          <table:table-cell office:value-type="float" office:value="11.8532" calcext:value-type="float">
            <text:p>11.8532</text:p>
          </table:table-cell>
          <table:table-cell office:value-type="float" office:value="11.9168" calcext:value-type="float">
            <text:p>11.9168</text:p>
          </table:table-cell>
          <table:table-cell office:value-type="float" office:value="12.2652" calcext:value-type="float">
            <text:p>12.2652</text:p>
          </table:table-cell>
          <table:table-cell office:value-type="float" office:value="12.4634" calcext:value-type="float">
            <text:p>12.4634</text:p>
          </table:table-cell>
          <table:table-cell office:value-type="float" office:value="12.4128" calcext:value-type="float">
            <text:p>12.4128</text:p>
          </table:table-cell>
          <table:table-cell office:value-type="float" office:value="12.0955" calcext:value-type="float">
            <text:p>12.0955</text:p>
          </table:table-cell>
        </table:table-row>
        <table:table-row table:style-name="ro2">
          <table:table-cell office:value-type="string" calcext:value-type="string">
            <text:p>32 x 64</text:p>
          </table:table-cell>
          <table:table-cell office:value-type="float" office:value="5.77357" calcext:value-type="float">
            <text:p>5.77357</text:p>
          </table:table-cell>
          <table:table-cell office:value-type="float" office:value="9.47709" calcext:value-type="float">
            <text:p>9.47709</text:p>
          </table:table-cell>
          <table:table-cell office:value-type="float" office:value="12.9293" calcext:value-type="float">
            <text:p>12.9293</text:p>
          </table:table-cell>
          <table:table-cell office:value-type="float" office:value="14.9533" calcext:value-type="float">
            <text:p>14.9533</text:p>
          </table:table-cell>
          <table:table-cell office:value-type="float" office:value="18.0584" calcext:value-type="float">
            <text:p>18.0584</text:p>
          </table:table-cell>
          <table:table-cell office:value-type="float" office:value="21.5614" calcext:value-type="float">
            <text:p>21.5614</text:p>
          </table:table-cell>
          <table:table-cell office:value-type="float" office:value="23.9813" calcext:value-type="float">
            <text:p>23.9813</text:p>
          </table:table-cell>
          <table:table-cell office:value-type="float" office:value="24.8051" calcext:value-type="float">
            <text:p>24.8051</text:p>
          </table:table-cell>
          <table:table-cell office:value-type="float" office:value="23.953" calcext:value-type="float">
            <text:p>23.953</text:p>
          </table:table-cell>
          <table:table-cell office:value-type="float" office:value="25.4324" calcext:value-type="float">
            <text:p>25.4324</text:p>
          </table:table-cell>
        </table:table-row>
        <table:table-row table:style-name="ro2">
          <table:table-cell office:value-type="string" calcext:value-type="string">
            <text:p>32 x 128</text:p>
          </table:table-cell>
          <table:table-cell office:value-type="float" office:value="4.64273" calcext:value-type="float">
            <text:p>4.64273</text:p>
          </table:table-cell>
          <table:table-cell office:value-type="float" office:value="8.64911" calcext:value-type="float">
            <text:p>8.64911</text:p>
          </table:table-cell>
          <table:table-cell office:value-type="float" office:value="14.0892" calcext:value-type="float">
            <text:p>14.0892</text:p>
          </table:table-cell>
          <table:table-cell office:value-type="float" office:value="17.8584" calcext:value-type="float">
            <text:p>17.8584</text:p>
          </table:table-cell>
          <table:table-cell office:value-type="float" office:value="22.5129" calcext:value-type="float">
            <text:p>22.5129</text:p>
          </table:table-cell>
          <table:table-cell office:value-type="float" office:value="25.0428" calcext:value-type="float">
            <text:p>25.0428</text:p>
          </table:table-cell>
          <table:table-cell office:value-type="float" office:value="27.6959" calcext:value-type="float">
            <text:p>27.6959</text:p>
          </table:table-cell>
          <table:table-cell office:value-type="float" office:value="28.7111" calcext:value-type="float">
            <text:p>28.7111</text:p>
          </table:table-cell>
          <table:table-cell office:value-type="float" office:value="29.5021" calcext:value-type="float">
            <text:p>29.5021</text:p>
          </table:table-cell>
          <table:table-cell office:value-type="float" office:value="29.8635" calcext:value-type="float">
            <text:p>29.8635</text:p>
          </table:table-cell>
        </table:table-row>
        <table:table-row table:style-name="ro2">
          <table:table-cell office:value-type="string" calcext:value-type="string">
            <text:p>64 x 64</text:p>
          </table:table-cell>
          <table:table-cell office:value-type="float" office:value="5.22462" calcext:value-type="float">
            <text:p>5.22462</text:p>
          </table:table-cell>
          <table:table-cell office:value-type="float" office:value="9.32477" calcext:value-type="float">
            <text:p>9.32477</text:p>
          </table:table-cell>
          <table:table-cell office:value-type="float" office:value="14.2937" calcext:value-type="float">
            <text:p>14.2937</text:p>
          </table:table-cell>
          <table:table-cell office:value-type="float" office:value="18.7374" calcext:value-type="float">
            <text:p>18.7374</text:p>
          </table:table-cell>
          <table:table-cell office:value-type="float" office:value="22.5949" calcext:value-type="float">
            <text:p>22.5949</text:p>
          </table:table-cell>
          <table:table-cell office:value-type="float" office:value="26.5457" calcext:value-type="float">
            <text:p>26.5457</text:p>
          </table:table-cell>
          <table:table-cell office:value-type="float" office:value="29.3412" calcext:value-type="float">
            <text:p>29.3412</text:p>
          </table:table-cell>
          <table:table-cell office:value-type="float" office:value="31.0409" calcext:value-type="float">
            <text:p>31.0409</text:p>
          </table:table-cell>
          <table:table-cell office:value-type="float" office:value="31.8403" calcext:value-type="float">
            <text:p>31.8403</text:p>
          </table:table-cell>
          <table:table-cell office:value-type="float" office:value="32.149" calcext:value-type="float">
            <text:p>32.149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<text:span text:style-name="T3">dtcr</text:span> 8<text:span text:style-name="T1">th</text:span></text:p>
          </table:table-cell>
          <table:table-cell office:value-type="string" calcext:value-type="string">
            <text:p>batch siz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b size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32 x 32</text:p>
          </table:table-cell>
          <table:table-cell office:value-type="float" office:value="3.73178" calcext:value-type="float">
            <text:p>3.73178</text:p>
          </table:table-cell>
          <table:table-cell office:value-type="float" office:value="5.63256" calcext:value-type="float">
            <text:p>5.63256</text:p>
          </table:table-cell>
          <table:table-cell office:value-type="float" office:value="7.41707" calcext:value-type="float">
            <text:p>7.41707</text:p>
          </table:table-cell>
          <table:table-cell office:value-type="float" office:value="9.03955" calcext:value-type="float">
            <text:p>9.03955</text:p>
          </table:table-cell>
          <table:table-cell office:value-type="float" office:value="9.45739" calcext:value-type="float">
            <text:p>9.45739</text:p>
          </table:table-cell>
          <table:table-cell office:value-type="float" office:value="10.2459" calcext:value-type="float">
            <text:p>10.2459</text:p>
          </table:table-cell>
          <table:table-cell office:value-type="float" office:value="10.5483" calcext:value-type="float">
            <text:p>10.5483</text:p>
          </table:table-cell>
          <table:table-cell office:value-type="float" office:value="10.7948" calcext:value-type="float">
            <text:p>10.7948</text:p>
          </table:table-cell>
          <table:table-cell office:value-type="float" office:value="10.6543" calcext:value-type="float">
            <text:p>10.6543</text:p>
          </table:table-cell>
          <table:table-cell office:value-type="float" office:value="10.7269" calcext:value-type="float">
            <text:p>10.7269</text:p>
          </table:table-cell>
        </table:table-row>
        <table:table-row table:style-name="ro2">
          <table:table-cell office:value-type="string" calcext:value-type="string">
            <text:p>32 x 64</text:p>
          </table:table-cell>
          <table:table-cell office:value-type="float" office:value="3.72435" calcext:value-type="float">
            <text:p>3.72435</text:p>
          </table:table-cell>
          <table:table-cell office:value-type="float" office:value="6.36395" calcext:value-type="float">
            <text:p>6.36395</text:p>
          </table:table-cell>
          <table:table-cell office:value-type="float" office:value="9.54384" calcext:value-type="float">
            <text:p>9.54384</text:p>
          </table:table-cell>
          <table:table-cell office:value-type="float" office:value="11.3299" calcext:value-type="float">
            <text:p>11.3299</text:p>
          </table:table-cell>
          <table:table-cell office:value-type="float" office:value="16.4988" calcext:value-type="float">
            <text:p>16.4988</text:p>
          </table:table-cell>
          <table:table-cell office:value-type="float" office:value="19.5925" calcext:value-type="float">
            <text:p>19.5925</text:p>
          </table:table-cell>
          <table:table-cell office:value-type="float" office:value="21.5041" calcext:value-type="float">
            <text:p>21.5041</text:p>
          </table:table-cell>
          <table:table-cell office:value-type="float" office:value="22.2652" calcext:value-type="float">
            <text:p>22.2652</text:p>
          </table:table-cell>
          <table:table-cell office:value-type="float" office:value="23.0569" calcext:value-type="float">
            <text:p>23.0569</text:p>
          </table:table-cell>
          <table:table-cell office:value-type="float" office:value="23.3417" calcext:value-type="float">
            <text:p>23.3417</text:p>
          </table:table-cell>
        </table:table-row>
        <table:table-row table:style-name="ro2">
          <table:table-cell office:value-type="string" calcext:value-type="string">
            <text:p>32 x 128</text:p>
          </table:table-cell>
          <table:table-cell office:value-type="float" office:value="3.13956" calcext:value-type="float">
            <text:p>3.13956</text:p>
          </table:table-cell>
          <table:table-cell office:value-type="float" office:value="5.84075" calcext:value-type="float">
            <text:p>5.84075</text:p>
          </table:table-cell>
          <table:table-cell office:value-type="float" office:value="9.69359" calcext:value-type="float">
            <text:p>9.69359</text:p>
          </table:table-cell>
          <table:table-cell office:value-type="float" office:value="13.6122" calcext:value-type="float">
            <text:p>13.6122</text:p>
          </table:table-cell>
          <table:table-cell office:value-type="float" office:value="16.7595" calcext:value-type="float">
            <text:p>16.7595</text:p>
          </table:table-cell>
          <table:table-cell office:value-type="float" office:value="18.4996" calcext:value-type="float">
            <text:p>18.4996</text:p>
          </table:table-cell>
          <table:table-cell office:value-type="float" office:value="20.9628" calcext:value-type="float">
            <text:p>20.9628</text:p>
          </table:table-cell>
          <table:table-cell office:value-type="float" office:value="21.7968" calcext:value-type="float">
            <text:p>21.7968</text:p>
          </table:table-cell>
          <table:table-cell office:value-type="float" office:value="22.415" calcext:value-type="float">
            <text:p>22.415</text:p>
          </table:table-cell>
          <table:table-cell office:value-type="float" office:value="22.5211" calcext:value-type="float">
            <text:p>22.5211</text:p>
          </table:table-cell>
        </table:table-row>
        <table:table-row table:style-name="ro2">
          <table:table-cell office:value-type="string" calcext:value-type="string">
            <text:p>64 x 64</text:p>
          </table:table-cell>
          <table:table-cell office:value-type="float" office:value="3.22906" calcext:value-type="float">
            <text:p>3.22906</text:p>
          </table:table-cell>
          <table:table-cell office:value-type="float" office:value="5.85682" calcext:value-type="float">
            <text:p>5.85682</text:p>
          </table:table-cell>
          <table:table-cell office:value-type="float" office:value="9.35678" calcext:value-type="float">
            <text:p>9.35678</text:p>
          </table:table-cell>
          <table:table-cell office:value-type="float" office:value="12.0829" calcext:value-type="float">
            <text:p>12.0829</text:p>
          </table:table-cell>
          <table:table-cell office:value-type="float" office:value="15.6973" calcext:value-type="float">
            <text:p>15.6973</text:p>
          </table:table-cell>
          <table:table-cell office:value-type="float" office:value="18.3398" calcext:value-type="float">
            <text:p>18.3398</text:p>
          </table:table-cell>
          <table:table-cell office:value-type="float" office:value="20.5007" calcext:value-type="float">
            <text:p>20.5007</text:p>
          </table:table-cell>
          <table:table-cell office:value-type="float" office:value="21.5502" calcext:value-type="float">
            <text:p>21.5502</text:p>
          </table:table-cell>
          <table:table-cell office:value-type="float" office:value="22.0629" calcext:value-type="float">
            <text:p>22.0629</text:p>
          </table:table-cell>
          <table:table-cell office:value-type="float" office:value="22.3415" calcext:value-type="float">
            <text:p>22.3415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<text:span text:style-name="T3">dtcr</text:span> 16<text:span text:style-name="T1">th</text:span></text:p>
          </table:table-cell>
          <table:table-cell office:value-type="string" calcext:value-type="string">
            <text:p>batch siz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b size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32 x 32</text:p>
          </table:table-cell>
          <table:table-cell office:value-type="float" office:value="2.21694" calcext:value-type="float">
            <text:p>2.21694</text:p>
          </table:table-cell>
          <table:table-cell office:value-type="float" office:value="3.6985" calcext:value-type="float">
            <text:p>3.6985</text:p>
          </table:table-cell>
          <table:table-cell office:value-type="float" office:value="4.83932" calcext:value-type="float">
            <text:p>4.83932</text:p>
          </table:table-cell>
          <table:table-cell office:value-type="float" office:value="6.23972" calcext:value-type="float">
            <text:p>6.23972</text:p>
          </table:table-cell>
          <table:table-cell office:value-type="float" office:value="7.89374" calcext:value-type="float">
            <text:p>7.89374</text:p>
          </table:table-cell>
          <table:table-cell office:value-type="float" office:value="9.05153" calcext:value-type="float">
            <text:p>9.05153</text:p>
          </table:table-cell>
          <table:table-cell office:value-type="float" office:value="9.7209" calcext:value-type="float">
            <text:p>9.7209</text:p>
          </table:table-cell>
          <table:table-cell office:value-type="float" office:value="9.94108" calcext:value-type="float">
            <text:p>9.94108</text:p>
          </table:table-cell>
          <table:table-cell office:value-type="float" office:value="10.117" calcext:value-type="float">
            <text:p>10.117</text:p>
          </table:table-cell>
          <table:table-cell office:value-type="float" office:value="10.1664" calcext:value-type="float">
            <text:p>10.1664</text:p>
          </table:table-cell>
        </table:table-row>
        <table:table-row table:style-name="ro2">
          <table:table-cell office:value-type="string" calcext:value-type="string">
            <text:p>32 x 64</text:p>
          </table:table-cell>
          <table:table-cell office:value-type="float" office:value="2.3099" calcext:value-type="float">
            <text:p>2.3099</text:p>
          </table:table-cell>
          <table:table-cell office:value-type="float" office:value="3.91939" calcext:value-type="float">
            <text:p>3.91939</text:p>
          </table:table-cell>
          <table:table-cell office:value-type="float" office:value="6.33196" calcext:value-type="float">
            <text:p>6.33196</text:p>
          </table:table-cell>
          <table:table-cell office:value-type="float" office:value="8.06444" calcext:value-type="float">
            <text:p>8.06444</text:p>
          </table:table-cell>
          <table:table-cell office:value-type="float" office:value="10.6301" calcext:value-type="float">
            <text:p>10.6301</text:p>
          </table:table-cell>
          <table:table-cell office:value-type="float" office:value="12.3571" calcext:value-type="float">
            <text:p>12.3571</text:p>
          </table:table-cell>
          <table:table-cell office:value-type="float" office:value="13.4033" calcext:value-type="float">
            <text:p>13.4033</text:p>
          </table:table-cell>
          <table:table-cell office:value-type="float" office:value="13.9813" calcext:value-type="float">
            <text:p>13.9813</text:p>
          </table:table-cell>
          <table:table-cell office:value-type="float" office:value="14.1044" calcext:value-type="float">
            <text:p>14.1044</text:p>
          </table:table-cell>
          <table:table-cell office:value-type="float" office:value="14.3405" calcext:value-type="float">
            <text:p>14.3405</text:p>
          </table:table-cell>
        </table:table-row>
        <table:table-row table:style-name="ro2">
          <table:table-cell office:value-type="string" calcext:value-type="string">
            <text:p>32 x 128</text:p>
          </table:table-cell>
          <table:table-cell office:value-type="float" office:value="1.93914" calcext:value-type="float">
            <text:p>1.93914</text:p>
          </table:table-cell>
          <table:table-cell office:value-type="float" office:value="3.59854" calcext:value-type="float">
            <text:p>3.59854</text:p>
          </table:table-cell>
          <table:table-cell office:value-type="float" office:value="6.13688" calcext:value-type="float">
            <text:p>6.13688</text:p>
          </table:table-cell>
          <table:table-cell office:value-type="float" office:value="9.6667" calcext:value-type="float">
            <text:p>9.6667</text:p>
          </table:table-cell>
          <table:table-cell office:value-type="float" office:value="10.8292" calcext:value-type="float">
            <text:p>10.8292</text:p>
          </table:table-cell>
          <table:table-cell office:value-type="float" office:value="11.9637" calcext:value-type="float">
            <text:p>11.9637</text:p>
          </table:table-cell>
          <table:table-cell office:value-type="float" office:value="13.3928" calcext:value-type="float">
            <text:p>13.3928</text:p>
          </table:table-cell>
          <table:table-cell office:value-type="float" office:value="14.0477" calcext:value-type="float">
            <text:p>14.0477</text:p>
          </table:table-cell>
          <table:table-cell office:value-type="float" office:value="14.3685" calcext:value-type="float">
            <text:p>14.3685</text:p>
          </table:table-cell>
          <table:table-cell office:value-type="float" office:value="14.52" calcext:value-type="float">
            <text:p>14.52</text:p>
          </table:table-cell>
        </table:table-row>
        <table:table-row table:style-name="ro2">
          <table:table-cell office:value-type="string" calcext:value-type="string">
            <text:p>64 x 64</text:p>
          </table:table-cell>
          <table:table-cell office:value-type="float" office:value="1.87849" calcext:value-type="float">
            <text:p>1.87849</text:p>
          </table:table-cell>
          <table:table-cell office:value-type="float" office:value="3.44225" calcext:value-type="float">
            <text:p>3.44225</text:p>
          </table:table-cell>
          <table:table-cell office:value-type="float" office:value="6.30775" calcext:value-type="float">
            <text:p>6.30775</text:p>
          </table:table-cell>
          <table:table-cell office:value-type="float" office:value="8.23569" calcext:value-type="float">
            <text:p>8.23569</text:p>
          </table:table-cell>
          <table:table-cell office:value-type="float" office:value="9.52084" calcext:value-type="float">
            <text:p>9.52084</text:p>
          </table:table-cell>
          <table:table-cell office:value-type="float" office:value="10.7057" calcext:value-type="float">
            <text:p>10.7057</text:p>
          </table:table-cell>
          <table:table-cell office:value-type="float" office:value="11.774" calcext:value-type="float">
            <text:p>11.774</text:p>
          </table:table-cell>
          <table:table-cell office:value-type="float" office:value="12.2427" calcext:value-type="float">
            <text:p>12.2427</text:p>
          </table:table-cell>
          <table:table-cell office:value-type="float" office:value="12.5013" calcext:value-type="float">
            <text:p>12.5013</text:p>
          </table:table-cell>
          <table:table-cell office:value-type="float" office:value="12.5853" calcext:value-type="float">
            <text:p>12.5853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plr 2nd</text:p>
          </table:table-cell>
          <table:table-cell office:value-type="string" calcext:value-type="string">
            <text:p>batch siz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b size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64 x 64</text:p>
          </table:table-cell>
          <table:table-cell office:value-type="float" office:value="6.89655" calcext:value-type="float">
            <text:p>6.89655</text:p>
          </table:table-cell>
          <table:table-cell office:value-type="float" office:value="9.11083" calcext:value-type="float">
            <text:p>9.11083</text:p>
          </table:table-cell>
          <table:table-cell office:value-type="float" office:value="10.4292" calcext:value-type="float">
            <text:p>10.4292</text:p>
          </table:table-cell>
          <table:table-cell office:value-type="float" office:value="12.7237" calcext:value-type="float">
            <text:p>12.7237</text:p>
          </table:table-cell>
          <table:table-cell office:value-type="float" office:value="15.4496" calcext:value-type="float">
            <text:p>15.4496</text:p>
          </table:table-cell>
          <table:table-cell office:value-type="float" office:value="20.2883" calcext:value-type="float">
            <text:p>20.2883</text:p>
          </table:table-cell>
          <table:table-cell office:value-type="float" office:value="23.8203" calcext:value-type="float">
            <text:p>23.8203</text:p>
          </table:table-cell>
          <table:table-cell office:value-type="float" office:value="26.3424" calcext:value-type="float">
            <text:p>26.3424</text:p>
          </table:table-cell>
          <table:table-cell office:value-type="float" office:value="28.0012" calcext:value-type="float">
            <text:p>28.0012</text:p>
          </table:table-cell>
          <table:table-cell office:value-type="float" office:value="28.7067" calcext:value-type="float">
            <text:p>28.7067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plr 4th</text:p>
          </table:table-cell>
          <table:table-cell office:value-type="string" calcext:value-type="string">
            <text:p>batch siz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b size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64 x 64</text:p>
          </table:table-cell>
          <table:table-cell office:value-type="float" office:value="5.39174" calcext:value-type="float">
            <text:p>5.39174</text:p>
          </table:table-cell>
          <table:table-cell office:value-type="float" office:value="6.76773" calcext:value-type="float">
            <text:p>6.76773</text:p>
          </table:table-cell>
          <table:table-cell office:value-type="float" office:value="8.3594" calcext:value-type="float">
            <text:p>8.3594</text:p>
          </table:table-cell>
          <table:table-cell office:value-type="float" office:value="10.2645" calcext:value-type="float">
            <text:p>10.2645</text:p>
          </table:table-cell>
          <table:table-cell office:value-type="float" office:value="13.2653" calcext:value-type="float">
            <text:p>13.2653</text:p>
          </table:table-cell>
          <table:table-cell office:value-type="float" office:value="16.1701" calcext:value-type="float">
            <text:p>16.1701</text:p>
          </table:table-cell>
          <table:table-cell office:value-type="float" office:value="17.9982" calcext:value-type="float">
            <text:p>17.9982</text:p>
          </table:table-cell>
          <table:table-cell office:value-type="float" office:value="19.0818" calcext:value-type="float">
            <text:p>19.0818</text:p>
          </table:table-cell>
          <table:table-cell office:value-type="float" office:value="19.5796" calcext:value-type="float">
            <text:p>19.5796</text:p>
          </table:table-cell>
          <table:table-cell office:value-type="float" office:value="19.7076" calcext:value-type="float">
            <text:p>19.7076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plr 8th</text:p>
          </table:table-cell>
          <table:table-cell office:value-type="string" calcext:value-type="string">
            <text:p>batch siz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b size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64 x 64</text:p>
          </table:table-cell>
          <table:table-cell office:value-type="float" office:value="3.85194" calcext:value-type="float">
            <text:p>3.85194</text:p>
          </table:table-cell>
          <table:table-cell office:value-type="float" office:value="5.19481" calcext:value-type="float">
            <text:p>5.19481</text:p>
          </table:table-cell>
          <table:table-cell office:value-type="float" office:value="6.09606" calcext:value-type="float">
            <text:p>6.09606</text:p>
          </table:table-cell>
          <table:table-cell office:value-type="float" office:value="7.7136" calcext:value-type="float">
            <text:p>7.7136</text:p>
          </table:table-cell>
          <table:table-cell office:value-type="float" office:value="9.22532" calcext:value-type="float">
            <text:p>9.22532</text:p>
          </table:table-cell>
          <table:table-cell office:value-type="float" office:value="10.2285" calcext:value-type="float">
            <text:p>10.2285</text:p>
          </table:table-cell>
          <table:table-cell office:value-type="float" office:value="10.8849" calcext:value-type="float">
            <text:p>10.8849</text:p>
          </table:table-cell>
          <table:table-cell office:value-type="float" office:value="11.1848" calcext:value-type="float">
            <text:p>11.1848</text:p>
          </table:table-cell>
          <table:table-cell office:value-type="float" office:value="11.2756" calcext:value-type="float">
            <text:p>11.2756</text:p>
          </table:table-cell>
          <table:table-cell office:value-type="float" office:value="11.2328" calcext:value-type="float">
            <text:p>11.2328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plr 16<text:span text:style-name="T1">th</text:span></text:p>
          </table:table-cell>
          <table:table-cell office:value-type="string" calcext:value-type="string">
            <text:p>batch siz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b size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64 x 64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MDefault" style:family="table-cell" style:parent-style-name="Default"/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6">00/00/0000</text:date>, <text:time style:data-style-name="N2" text:time-value="23:09:42.8537114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1T22:52:02.028120638</meta:creation-date>
    <dc:date>2026-07-06T22:56:00.116190063</dc:date>
    <meta:editing-duration>PT11H15M23S</meta:editing-duration>
    <meta:editing-cycles>282</meta:editing-cycles>
    <meta:generator>LibreOffice/24.2.7.2$Linux_X86_64 LibreOffice_project/420$Build-2</meta:generator>
    <meta:document-statistic meta:table-count="1" meta:cell-count="770" meta:object-count="0"/>
  </office:meta>
</office:document-meta>
</file>