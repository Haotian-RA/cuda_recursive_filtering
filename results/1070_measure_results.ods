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h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89469" calcext:value-type="float">
            <text:p>6.89469</text:p>
          </table:table-cell>
          <table:table-cell office:value-type="float" office:value="9.11032" calcext:value-type="float">
            <text:p>9.11032</text:p>
          </table:table-cell>
          <table:table-cell office:value-type="float" office:value="10.1972" calcext:value-type="float">
            <text:p>10.1972</text:p>
          </table:table-cell>
          <table:table-cell office:value-type="float" office:value="10.4717" calcext:value-type="float">
            <text:p>10.4717</text:p>
          </table:table-cell>
          <table:table-cell office:value-type="float" office:value="10.8855" calcext:value-type="float">
            <text:p>10.8855</text:p>
          </table:table-cell>
          <table:table-cell office:value-type="float" office:value="11.4365" calcext:value-type="float">
            <text:p>11.4365</text:p>
          </table:table-cell>
          <table:table-cell office:value-type="float" office:value="11.7497" calcext:value-type="float">
            <text:p>11.7497</text:p>
          </table:table-cell>
          <table:table-cell office:value-type="float" office:value="11.7548" calcext:value-type="float">
            <text:p>11.7548</text:p>
          </table:table-cell>
          <table:table-cell office:value-type="float" office:value="11.8368" calcext:value-type="float">
            <text:p>11.8368</text:p>
          </table:table-cell>
          <table:table-cell office:value-type="float" office:value="11.8259" calcext:value-type="float">
            <text:p>11.825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66873" calcext:value-type="float">
            <text:p>5.66873</text:p>
          </table:table-cell>
          <table:table-cell office:value-type="float" office:value="9.35331" calcext:value-type="float">
            <text:p>9.35331</text:p>
          </table:table-cell>
          <table:table-cell office:value-type="float" office:value="12.784" calcext:value-type="float">
            <text:p>12.784</text:p>
          </table:table-cell>
          <table:table-cell office:value-type="float" office:value="15.3848" calcext:value-type="float">
            <text:p>15.3848</text:p>
          </table:table-cell>
          <table:table-cell office:value-type="float" office:value="18.0951" calcext:value-type="float">
            <text:p>18.0951</text:p>
          </table:table-cell>
          <table:table-cell office:value-type="float" office:value="19.2789" calcext:value-type="float">
            <text:p>19.2789</text:p>
          </table:table-cell>
          <table:table-cell office:value-type="float" office:value="20.1101" calcext:value-type="float">
            <text:p>20.1101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21.0749" calcext:value-type="float">
            <text:p>21.0749</text:p>
          </table:table-cell>
          <table:table-cell office:value-type="float" office:value="21.195" calcext:value-type="float">
            <text:p>21.19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77491" calcext:value-type="float">
            <text:p>3.77491</text:p>
          </table:table-cell>
          <table:table-cell office:value-type="float" office:value="7.62359" calcext:value-type="float">
            <text:p>7.62359</text:p>
          </table:table-cell>
          <table:table-cell office:value-type="float" office:value="14.0522" calcext:value-type="float">
            <text:p>14.0522</text:p>
          </table:table-cell>
          <table:table-cell office:value-type="float" office:value="13.3022" calcext:value-type="float">
            <text:p>13.3022</text:p>
          </table:table-cell>
          <table:table-cell office:value-type="float" office:value="13.2944" calcext:value-type="float">
            <text:p>13.2944</text:p>
          </table:table-cell>
          <table:table-cell office:value-type="float" office:value="15.1811" calcext:value-type="float">
            <text:p>15.1811</text:p>
          </table:table-cell>
          <table:table-cell office:value-type="float" office:value="15.1558" calcext:value-type="float">
            <text:p>15.1558</text:p>
          </table:table-cell>
          <table:table-cell office:value-type="float" office:value="15.5534" calcext:value-type="float">
            <text:p>15.5534</text:p>
          </table:table-cell>
          <table:table-cell office:value-type="float" office:value="15.6908" calcext:value-type="float">
            <text:p>15.6908</text:p>
          </table:table-cell>
          <table:table-cell office:value-type="float" office:value="15.8206" calcext:value-type="float">
            <text:p>15.820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29144" calcext:value-type="float">
            <text:p>5.29144</text:p>
          </table:table-cell>
          <table:table-cell office:value-type="float" office:value="10.2568" calcext:value-type="float">
            <text:p>10.2568</text:p>
          </table:table-cell>
          <table:table-cell office:value-type="float" office:value="15.1122" calcext:value-type="float">
            <text:p>15.1122</text:p>
          </table:table-cell>
          <table:table-cell office:value-type="float" office:value="15.1081" calcext:value-type="float">
            <text:p>15.1081</text:p>
          </table:table-cell>
          <table:table-cell office:value-type="float" office:value="16.6315" calcext:value-type="float">
            <text:p>16.6315</text:p>
          </table:table-cell>
          <table:table-cell office:value-type="float" office:value="17.727" calcext:value-type="float">
            <text:p>17.727</text:p>
          </table:table-cell>
          <table:table-cell office:value-type="float" office:value="17.8453" calcext:value-type="float">
            <text:p>17.8453</text:p>
          </table:table-cell>
          <table:table-cell office:value-type="float" office:value="18.1388" calcext:value-type="float">
            <text:p>18.1388</text:p>
          </table:table-cell>
          <table:table-cell office:value-type="float" office:value="18.3675" calcext:value-type="float">
            <text:p>18.3675</text:p>
          </table:table-cell>
          <table:table-cell office:value-type="float" office:value="18.4417" calcext:value-type="float">
            <text:p>18.441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4.89297" calcext:value-type="float">
            <text:p>4.89297</text:p>
          </table:table-cell>
          <table:table-cell office:value-type="float" office:value="7.70468" calcext:value-type="float">
            <text:p>7.70468</text:p>
          </table:table-cell>
          <table:table-cell office:value-type="float" office:value="8.82526" calcext:value-type="float">
            <text:p>8.82526</text:p>
          </table:table-cell>
          <table:table-cell office:value-type="float" office:value="9.72927" calcext:value-type="float">
            <text:p>9.72927</text:p>
          </table:table-cell>
          <table:table-cell office:value-type="float" office:value="10.7653" calcext:value-type="float">
            <text:p>10.7653</text:p>
          </table:table-cell>
          <table:table-cell office:value-type="float" office:value="11.3924" calcext:value-type="float">
            <text:p>11.3924</text:p>
          </table:table-cell>
          <table:table-cell office:value-type="float" office:value="11.7024" calcext:value-type="float">
            <text:p>11.7024</text:p>
          </table:table-cell>
          <table:table-cell office:value-type="float" office:value="11.8991" calcext:value-type="float">
            <text:p>11.8991</text:p>
          </table:table-cell>
          <table:table-cell office:value-type="float" office:value="12.0394" calcext:value-type="float">
            <text:p>12.0394</text:p>
          </table:table-cell>
          <table:table-cell office:value-type="float" office:value="12.1287" calcext:value-type="float">
            <text:p>12.1287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19831" calcext:value-type="float">
            <text:p>4.19831</text:p>
          </table:table-cell>
          <table:table-cell office:value-type="float" office:value="7.52941" calcext:value-type="float">
            <text:p>7.52941</text:p>
          </table:table-cell>
          <table:table-cell office:value-type="float" office:value="11.2236" calcext:value-type="float">
            <text:p>11.2236</text:p>
          </table:table-cell>
          <table:table-cell office:value-type="float" office:value="12.865" calcext:value-type="float">
            <text:p>12.865</text:p>
          </table:table-cell>
          <table:table-cell office:value-type="float" office:value="14.4307" calcext:value-type="float">
            <text:p>14.4307</text:p>
          </table:table-cell>
          <table:table-cell office:value-type="float" office:value="15.7818" calcext:value-type="float">
            <text:p>15.7818</text:p>
          </table:table-cell>
          <table:table-cell office:value-type="float" office:value="16.8999" calcext:value-type="float">
            <text:p>16.8999</text:p>
          </table:table-cell>
          <table:table-cell office:value-type="float" office:value="17.3288" calcext:value-type="float">
            <text:p>17.3288</text:p>
          </table:table-cell>
          <table:table-cell office:value-type="float" office:value="17.5845" calcext:value-type="float">
            <text:p>17.5845</text:p>
          </table:table-cell>
          <table:table-cell office:value-type="float" office:value="17.7543" calcext:value-type="float">
            <text:p>17.7543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72572" calcext:value-type="float">
            <text:p>2.72572</text:p>
          </table:table-cell>
          <table:table-cell office:value-type="float" office:value="5.99672" calcext:value-type="float">
            <text:p>5.99672</text:p>
          </table:table-cell>
          <table:table-cell office:value-type="float" office:value="10.705" calcext:value-type="float">
            <text:p>10.705</text:p>
          </table:table-cell>
          <table:table-cell office:value-type="float" office:value="10.0432" calcext:value-type="float">
            <text:p>10.0432</text:p>
          </table:table-cell>
          <table:table-cell office:value-type="float" office:value="11.0488" calcext:value-type="float">
            <text:p>11.0488</text:p>
          </table:table-cell>
          <table:table-cell office:value-type="float" office:value="12.695" calcext:value-type="float">
            <text:p>12.695</text:p>
          </table:table-cell>
          <table:table-cell office:value-type="float" office:value="12.6966" calcext:value-type="float">
            <text:p>12.6966</text:p>
          </table:table-cell>
          <table:table-cell office:value-type="float" office:value="12.9414" calcext:value-type="float">
            <text:p>12.9414</text:p>
          </table:table-cell>
          <table:table-cell office:value-type="float" office:value="13.0828" calcext:value-type="float">
            <text:p>13.0828</text:p>
          </table:table-cell>
          <table:table-cell office:value-type="float" office:value="13.1629" calcext:value-type="float">
            <text:p>13.1629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81179" calcext:value-type="float">
            <text:p>3.81179</text:p>
          </table:table-cell>
          <table:table-cell office:value-type="float" office:value="8.07332" calcext:value-type="float">
            <text:p>8.07332</text:p>
          </table:table-cell>
          <table:table-cell office:value-type="float" office:value="13.545" calcext:value-type="float">
            <text:p>13.545</text:p>
          </table:table-cell>
          <table:table-cell office:value-type="float" office:value="12.5679" calcext:value-type="float">
            <text:p>12.5679</text:p>
          </table:table-cell>
          <table:table-cell office:value-type="float" office:value="13.035" calcext:value-type="float">
            <text:p>13.035</text:p>
          </table:table-cell>
          <table:table-cell office:value-type="float" office:value="14.3952" calcext:value-type="float">
            <text:p>14.3952</text:p>
          </table:table-cell>
          <table:table-cell office:value-type="float" office:value="14.8594" calcext:value-type="float">
            <text:p>14.8594</text:p>
          </table:table-cell>
          <table:table-cell office:value-type="float" office:value="14.9598" calcext:value-type="float">
            <text:p>14.9598</text:p>
          </table:table-cell>
          <table:table-cell office:value-type="float" office:value="15.3577" calcext:value-type="float">
            <text:p>15.3577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25617" calcext:value-type="float">
            <text:p>3.25617</text:p>
          </table:table-cell>
          <table:table-cell office:value-type="float" office:value="5.54113" calcext:value-type="float">
            <text:p>5.54113</text:p>
          </table:table-cell>
          <table:table-cell office:value-type="float" office:value="7.52668" calcext:value-type="float">
            <text:p>7.52668</text:p>
          </table:table-cell>
          <table:table-cell office:value-type="float" office:value="8.89383" calcext:value-type="float">
            <text:p>8.89383</text:p>
          </table:table-cell>
          <table:table-cell office:value-type="float" office:value="9.69757" calcext:value-type="float">
            <text:p>9.69757</text:p>
          </table:table-cell>
          <table:table-cell office:value-type="float" office:value="10.5681" calcext:value-type="float">
            <text:p>10.5681</text:p>
          </table:table-cell>
          <table:table-cell office:value-type="float" office:value="10.8636" calcext:value-type="float">
            <text:p>10.8636</text:p>
          </table:table-cell>
          <table:table-cell office:value-type="float" office:value="11.1666" calcext:value-type="float">
            <text:p>11.1666</text:p>
          </table:table-cell>
          <table:table-cell office:value-type="float" office:value="11.3352" calcext:value-type="float">
            <text:p>11.3352</text:p>
          </table:table-cell>
          <table:table-cell office:value-type="float" office:value="11.3299" calcext:value-type="float">
            <text:p>11.329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39539" calcext:value-type="float">
            <text:p>3.39539</text:p>
          </table:table-cell>
          <table:table-cell office:value-type="float" office:value="6.04928" calcext:value-type="float">
            <text:p>6.04928</text:p>
          </table:table-cell>
          <table:table-cell office:value-type="float" office:value="9.15681" calcext:value-type="float">
            <text:p>9.15681</text:p>
          </table:table-cell>
          <table:table-cell office:value-type="float" office:value="9.65588" calcext:value-type="float">
            <text:p>9.65588</text:p>
          </table:table-cell>
          <table:table-cell office:value-type="float" office:value="10.6784" calcext:value-type="float">
            <text:p>10.6784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685" calcext:value-type="float">
            <text:p>12.685</text:p>
          </table:table-cell>
          <table:table-cell office:value-type="float" office:value="13.3199" calcext:value-type="float">
            <text:p>13.3199</text:p>
          </table:table-cell>
          <table:table-cell office:value-type="float" office:value="13.4838" calcext:value-type="float">
            <text:p>13.4838</text:p>
          </table:table-cell>
          <table:table-cell office:value-type="float" office:value="13.5796" calcext:value-type="float">
            <text:p>13.5796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27031" calcext:value-type="float">
            <text:p>2.27031</text:p>
          </table:table-cell>
          <table:table-cell office:value-type="float" office:value="3.79149" calcext:value-type="float">
            <text:p>3.79149</text:p>
          </table:table-cell>
          <table:table-cell office:value-type="float" office:value="7.33009" calcext:value-type="float">
            <text:p>7.33009</text:p>
          </table:table-cell>
          <table:table-cell office:value-type="float" office:value="7.77466" calcext:value-type="float">
            <text:p>7.77466</text:p>
          </table:table-cell>
          <table:table-cell office:value-type="float" office:value="8.27241" calcext:value-type="float">
            <text:p>8.27241</text:p>
          </table:table-cell>
          <table:table-cell office:value-type="float" office:value="9.42548" calcext:value-type="float">
            <text:p>9.42548</text:p>
          </table:table-cell>
          <table:table-cell office:value-type="float" office:value="9.60229" calcext:value-type="float">
            <text:p>9.60229</text:p>
          </table:table-cell>
          <table:table-cell office:value-type="float" office:value="9.75693" calcext:value-type="float">
            <text:p>9.75693</text:p>
          </table:table-cell>
          <table:table-cell office:value-type="float" office:value="10.0321" calcext:value-type="float">
            <text:p>10.0321</text:p>
          </table:table-cell>
          <table:table-cell office:value-type="float" office:value="10.0436" calcext:value-type="float">
            <text:p>10.043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51919" calcext:value-type="float">
            <text:p>2.51919</text:p>
          </table:table-cell>
          <table:table-cell office:value-type="float" office:value="5.32225" calcext:value-type="float">
            <text:p>5.32225</text:p>
          </table:table-cell>
          <table:table-cell office:value-type="float" office:value="9.47282" calcext:value-type="float">
            <text:p>9.47282</text:p>
          </table:table-cell>
          <table:table-cell office:value-type="float" office:value="9.19293" calcext:value-type="float">
            <text:p>9.19293</text:p>
          </table:table-cell>
          <table:table-cell office:value-type="float" office:value="9.54879" calcext:value-type="float">
            <text:p>9.54879</text:p>
          </table:table-cell>
          <table:table-cell office:value-type="float" office:value="10.7121" calcext:value-type="float">
            <text:p>10.7121</text:p>
          </table:table-cell>
          <table:table-cell office:value-type="float" office:value="11.4452" calcext:value-type="float">
            <text:p>11.4452</text:p>
          </table:table-cell>
          <table:table-cell office:value-type="float" office:value="11.7681" calcext:value-type="float">
            <text:p>11.7681</text:p>
          </table:table-cell>
          <table:table-cell office:value-type="float" office:value="11.8771" calcext:value-type="float">
            <text:p>11.8771</text:p>
          </table:table-cell>
          <table:table-cell office:value-type="float" office:value="11.9582" calcext:value-type="float">
            <text:p>11.9582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47739" calcext:value-type="float">
            <text:p>2.47739</text:p>
          </table:table-cell>
          <table:table-cell office:value-type="float" office:value="4.17844" calcext:value-type="float">
            <text:p>4.17844</text:p>
          </table:table-cell>
          <table:table-cell office:value-type="float" office:value="5.61354" calcext:value-type="float">
            <text:p>5.61354</text:p>
          </table:table-cell>
          <table:table-cell office:value-type="float" office:value="6.25802" calcext:value-type="float">
            <text:p>6.25802</text:p>
          </table:table-cell>
          <table:table-cell office:value-type="float" office:value="7.34656" calcext:value-type="float">
            <text:p>7.34656</text:p>
          </table:table-cell>
          <table:table-cell office:value-type="float" office:value="8.06919" calcext:value-type="float">
            <text:p>8.06919</text:p>
          </table:table-cell>
          <table:table-cell office:value-type="float" office:value="8.56814" calcext:value-type="float">
            <text:p>8.56814</text:p>
          </table:table-cell>
          <table:table-cell office:value-type="float" office:value="8.90393" calcext:value-type="float">
            <text:p>8.90393</text:p>
          </table:table-cell>
          <table:table-cell office:value-type="float" office:value="9.0618" calcext:value-type="float">
            <text:p>9.0618</text:p>
          </table:table-cell>
          <table:table-cell office:value-type="float" office:value="9.03893" calcext:value-type="float">
            <text:p>9.0389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84332" calcext:value-type="float">
            <text:p>1.84332</text:p>
          </table:table-cell>
          <table:table-cell office:value-type="float" office:value="3.77202" calcext:value-type="float">
            <text:p>3.77202</text:p>
          </table:table-cell>
          <table:table-cell office:value-type="float" office:value="6.22492" calcext:value-type="float">
            <text:p>6.22492</text:p>
          </table:table-cell>
          <table:table-cell office:value-type="float" office:value="6.53492" calcext:value-type="float">
            <text:p>6.53492</text:p>
          </table:table-cell>
          <table:table-cell office:value-type="float" office:value="7.06841" calcext:value-type="float">
            <text:p>7.06841</text:p>
          </table:table-cell>
          <table:table-cell office:value-type="float" office:value="8.01558" calcext:value-type="float">
            <text:p>8.01558</text:p>
          </table:table-cell>
          <table:table-cell office:value-type="float" office:value="8.44379" calcext:value-type="float">
            <text:p>8.44379</text:p>
          </table:table-cell>
          <table:table-cell office:value-type="float" office:value="8.80492" calcext:value-type="float">
            <text:p>8.80492</text:p>
          </table:table-cell>
          <table:table-cell office:value-type="float" office:value="8.98733" calcext:value-type="float">
            <text:p>8.98733</text:p>
          </table:table-cell>
          <table:table-cell office:value-type="float" office:value="9.02224" calcext:value-type="float">
            <text:p>9.0222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29847" calcext:value-type="float">
            <text:p>1.29847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5.00403" calcext:value-type="float">
            <text:p>5.00403</text:p>
          </table:table-cell>
          <table:table-cell office:value-type="float" office:value="5.08769" calcext:value-type="float">
            <text:p>5.08769</text:p>
          </table:table-cell>
          <table:table-cell office:value-type="float" office:value="5.33864" calcext:value-type="float">
            <text:p>5.33864</text:p>
          </table:table-cell>
          <table:table-cell office:value-type="float" office:value="5.82865" calcext:value-type="float">
            <text:p>5.82865</text:p>
          </table:table-cell>
          <table:table-cell office:value-type="float" office:value="5.97795" calcext:value-type="float">
            <text:p>5.97795</text:p>
          </table:table-cell>
          <table:table-cell office:value-type="float" office:value="6.01601" calcext:value-type="float">
            <text:p>6.01601</text:p>
          </table:table-cell>
          <table:table-cell office:value-type="float" office:value="6.01748" calcext:value-type="float">
            <text:p>6.01748</text:p>
          </table:table-cell>
          <table:table-cell office:value-type="float" office:value="6.09226" calcext:value-type="float">
            <text:p>6.0922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52675" calcext:value-type="float">
            <text:p>1.52675</text:p>
          </table:table-cell>
          <table:table-cell office:value-type="float" office:value="3.52277" calcext:value-type="float">
            <text:p>3.52277</text:p>
          </table:table-cell>
          <table:table-cell office:value-type="float" office:value="6.18157" calcext:value-type="float">
            <text:p>6.18157</text:p>
          </table:table-cell>
          <table:table-cell office:value-type="float" office:value="5.99041" calcext:value-type="float">
            <text:p>5.99041</text:p>
          </table:table-cell>
          <table:table-cell office:value-type="float" office:value="6.32942" calcext:value-type="float">
            <text:p>6.32942</text:p>
          </table:table-cell>
          <table:table-cell office:value-type="float" office:value="7.26424" calcext:value-type="float">
            <text:p>7.26424</text:p>
          </table:table-cell>
          <table:table-cell office:value-type="float" office:value="7.84833" calcext:value-type="float">
            <text:p>7.84833</text:p>
          </table:table-cell>
          <table:table-cell office:value-type="float" office:value="8.18465" calcext:value-type="float">
            <text:p>8.18465</text:p>
          </table:table-cell>
          <table:table-cell office:value-type="float" office:value="8.3393" calcext:value-type="float">
            <text:p>8.3393</text:p>
          </table:table-cell>
          <table:table-cell office:value-type="float" office:value="8.434" calcext:value-type="float">
            <text:p>8.434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s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98131" calcext:value-type="float">
            <text:p>5.98131</text:p>
          </table:table-cell>
          <table:table-cell office:value-type="float" office:value="8.18774" calcext:value-type="float">
            <text:p>8.18774</text:p>
          </table:table-cell>
          <table:table-cell office:value-type="float" office:value="9.44998" calcext:value-type="float">
            <text:p>9.44998</text:p>
          </table:table-cell>
          <table:table-cell office:value-type="float" office:value="9.6878" calcext:value-type="float">
            <text:p>9.6878</text:p>
          </table:table-cell>
          <table:table-cell office:value-type="float" office:value="10.5759" calcext:value-type="float">
            <text:p>10.5759</text:p>
          </table:table-cell>
          <table:table-cell office:value-type="float" office:value="10.6382" calcext:value-type="float">
            <text:p>10.6382</text:p>
          </table:table-cell>
          <table:table-cell office:value-type="float" office:value="11.0062" calcext:value-type="float">
            <text:p>11.0062</text:p>
          </table:table-cell>
          <table:table-cell office:value-type="float" office:value="11.1015" calcext:value-type="float">
            <text:p>11.1015</text:p>
          </table:table-cell>
          <table:table-cell office:value-type="float" office:value="11.1906" calcext:value-type="float">
            <text:p>11.1906</text:p>
          </table:table-cell>
          <table:table-cell office:value-type="float" office:value="11.2808" calcext:value-type="float">
            <text:p>11.2808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41455" calcext:value-type="float">
            <text:p>5.41455</text:p>
          </table:table-cell>
          <table:table-cell office:value-type="float" office:value="8.83673" calcext:value-type="float">
            <text:p>8.83673</text:p>
          </table:table-cell>
          <table:table-cell office:value-type="float" office:value="14.343" calcext:value-type="float">
            <text:p>14.343</text:p>
          </table:table-cell>
          <table:table-cell office:value-type="float" office:value="15.7611" calcext:value-type="float">
            <text:p>15.7611</text:p>
          </table:table-cell>
          <table:table-cell office:value-type="float" office:value="17.874" calcext:value-type="float">
            <text:p>17.874</text:p>
          </table:table-cell>
          <table:table-cell office:value-type="float" office:value="19.1601" calcext:value-type="float">
            <text:p>19.1601</text:p>
          </table:table-cell>
          <table:table-cell office:value-type="float" office:value="19.6788" calcext:value-type="float">
            <text:p>19.6788</text:p>
          </table:table-cell>
          <table:table-cell office:value-type="float" office:value="20.1292" calcext:value-type="float">
            <text:p>20.1292</text:p>
          </table:table-cell>
          <table:table-cell office:value-type="float" office:value="20.5528" calcext:value-type="float">
            <text:p>20.5528</text:p>
          </table:table-cell>
          <table:table-cell office:value-type="float" office:value="20.8106" calcext:value-type="float">
            <text:p>20.8106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30181" calcext:value-type="float">
            <text:p>3.30181</text:p>
          </table:table-cell>
          <table:table-cell office:value-type="float" office:value="6.7019" calcext:value-type="float">
            <text:p>6.7019</text:p>
          </table:table-cell>
          <table:table-cell office:value-type="float" office:value="12.1673" calcext:value-type="float">
            <text:p>12.1673</text:p>
          </table:table-cell>
          <table:table-cell office:value-type="float" office:value="12.9916" calcext:value-type="float">
            <text:p>12.9916</text:p>
          </table:table-cell>
          <table:table-cell office:value-type="float" office:value="13.3996" calcext:value-type="float">
            <text:p>13.3996</text:p>
          </table:table-cell>
          <table:table-cell office:value-type="float" office:value="14.9326" calcext:value-type="float">
            <text:p>14.9326</text:p>
          </table:table-cell>
          <table:table-cell office:value-type="float" office:value="15.0287" calcext:value-type="float">
            <text:p>15.0287</text:p>
          </table:table-cell>
          <table:table-cell office:value-type="float" office:value="14.9917" calcext:value-type="float">
            <text:p>14.9917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15.3749" calcext:value-type="float">
            <text:p>15.3749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4353" calcext:value-type="float">
            <text:p>4.4353</text:p>
          </table:table-cell>
          <table:table-cell office:value-type="float" office:value="9.51319" calcext:value-type="float">
            <text:p>9.51319</text:p>
          </table:table-cell>
          <table:table-cell office:value-type="float" office:value="15.8367" calcext:value-type="float">
            <text:p>15.8367</text:p>
          </table:table-cell>
          <table:table-cell office:value-type="float" office:value="14.1319" calcext:value-type="float">
            <text:p>14.1319</text:p>
          </table:table-cell>
          <table:table-cell office:value-type="float" office:value="14.5661" calcext:value-type="float">
            <text:p>14.5661</text:p>
          </table:table-cell>
          <table:table-cell office:value-type="float" office:value="15.8238" calcext:value-type="float">
            <text:p>15.8238</text:p>
          </table:table-cell>
          <table:table-cell office:value-type="float" office:value="16.1222" calcext:value-type="float">
            <text:p>16.1222</text:p>
          </table:table-cell>
          <table:table-cell office:value-type="float" office:value="16.4834" calcext:value-type="float">
            <text:p>16.4834</text:p>
          </table:table-cell>
          <table:table-cell office:value-type="float" office:value="16.5916" calcext:value-type="float">
            <text:p>16.5916</text:p>
          </table:table-cell>
          <table:table-cell office:value-type="float" office:value="16.4698" calcext:value-type="float">
            <text:p>16.4698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s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4.42447" calcext:value-type="float">
            <text:p>4.42447</text:p>
          </table:table-cell>
          <table:table-cell office:value-type="float" office:value="7.07769" calcext:value-type="float">
            <text:p>7.07769</text:p>
          </table:table-cell>
          <table:table-cell office:value-type="float" office:value="8.3252" calcext:value-type="float">
            <text:p>8.3252</text:p>
          </table:table-cell>
          <table:table-cell office:value-type="float" office:value="9.91774" calcext:value-type="float">
            <text:p>9.91774</text:p>
          </table:table-cell>
          <table:table-cell office:value-type="float" office:value="11.015" calcext:value-type="float">
            <text:p>11.015</text:p>
          </table:table-cell>
          <table:table-cell office:value-type="float" office:value="11.6433" calcext:value-type="float">
            <text:p>11.6433</text:p>
          </table:table-cell>
          <table:table-cell office:value-type="float" office:value="12.0661" calcext:value-type="float">
            <text:p>12.0661</text:p>
          </table:table-cell>
          <table:table-cell office:value-type="float" office:value="12.2669" calcext:value-type="float">
            <text:p>12.2669</text:p>
          </table:table-cell>
          <table:table-cell office:value-type="float" office:value="12.4508" calcext:value-type="float">
            <text:p>12.4508</text:p>
          </table:table-cell>
          <table:table-cell office:value-type="float" office:value="12.5685" calcext:value-type="float">
            <text:p>12.568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55759" calcext:value-type="float">
            <text:p>4.55759</text:p>
          </table:table-cell>
          <table:table-cell office:value-type="float" office:value="6.69806" calcext:value-type="float">
            <text:p>6.69806</text:p>
          </table:table-cell>
          <table:table-cell office:value-type="float" office:value="10.5263" calcext:value-type="float">
            <text:p>10.5263</text:p>
          </table:table-cell>
          <table:table-cell office:value-type="float" office:value="12.3881" calcext:value-type="float">
            <text:p>12.3881</text:p>
          </table:table-cell>
          <table:table-cell office:value-type="float" office:value="13.5539" calcext:value-type="float">
            <text:p>13.5539</text:p>
          </table:table-cell>
          <table:table-cell office:value-type="float" office:value="14.8937" calcext:value-type="float">
            <text:p>14.8937</text:p>
          </table:table-cell>
          <table:table-cell office:value-type="float" office:value="16.0063" calcext:value-type="float">
            <text:p>16.0063</text:p>
          </table:table-cell>
          <table:table-cell office:value-type="float" office:value="16.5652" calcext:value-type="float">
            <text:p>16.5652</text:p>
          </table:table-cell>
          <table:table-cell office:value-type="float" office:value="16.8674" calcext:value-type="float">
            <text:p>16.8674</text:p>
          </table:table-cell>
          <table:table-cell office:value-type="float" office:value="17.0549" calcext:value-type="float">
            <text:p>17.0549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92806" calcext:value-type="float">
            <text:p>2.92806</text:p>
          </table:table-cell>
          <table:table-cell office:value-type="float" office:value="5.07433" calcext:value-type="float">
            <text:p>5.07433</text:p>
          </table:table-cell>
          <table:table-cell office:value-type="float" office:value="9.31465" calcext:value-type="float">
            <text:p>9.31465</text:p>
          </table:table-cell>
          <table:table-cell office:value-type="float" office:value="10.0917" calcext:value-type="float">
            <text:p>10.0917</text:p>
          </table:table-cell>
          <table:table-cell office:value-type="float" office:value="10.5297" calcext:value-type="float">
            <text:p>10.5297</text:p>
          </table:table-cell>
          <table:table-cell office:value-type="float" office:value="11.6776" calcext:value-type="float">
            <text:p>11.6776</text:p>
          </table:table-cell>
          <table:table-cell office:value-type="float" office:value="11.9912" calcext:value-type="float">
            <text:p>11.9912</text:p>
          </table:table-cell>
          <table:table-cell office:value-type="float" office:value="12.2504" calcext:value-type="float">
            <text:p>12.2504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4234" calcext:value-type="float">
            <text:p>12.423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00472" calcext:value-type="float">
            <text:p>3.00472</text:p>
          </table:table-cell>
          <table:table-cell office:value-type="float" office:value="6.50272" calcext:value-type="float">
            <text:p>6.50272</text:p>
          </table:table-cell>
          <table:table-cell office:value-type="float" office:value="11.1523" calcext:value-type="float">
            <text:p>11.1523</text:p>
          </table:table-cell>
          <table:table-cell office:value-type="float" office:value="10.6671" calcext:value-type="float">
            <text:p>10.6671</text:p>
          </table:table-cell>
          <table:table-cell office:value-type="float" office:value="10.8018" calcext:value-type="float">
            <text:p>10.8018</text:p>
          </table:table-cell>
          <table:table-cell office:value-type="float" office:value="12.2174" calcext:value-type="float">
            <text:p>12.2174</text:p>
          </table:table-cell>
          <table:table-cell office:value-type="float" office:value="12.269" calcext:value-type="float">
            <text:p>12.269</text:p>
          </table:table-cell>
          <table:table-cell office:value-type="float" office:value="12.7355" calcext:value-type="float">
            <text:p>12.7355</text:p>
          </table:table-cell>
          <table:table-cell office:value-type="float" office:value="12.7501" calcext:value-type="float">
            <text:p>12.7501</text:p>
          </table:table-cell>
          <table:table-cell office:value-type="float" office:value="12.9243" calcext:value-type="float">
            <text:p>12.9243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s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10618" calcext:value-type="float">
            <text:p>3.10618</text:p>
          </table:table-cell>
          <table:table-cell office:value-type="float" office:value="5.06661" calcext:value-type="float">
            <text:p>5.06661</text:p>
          </table:table-cell>
          <table:table-cell office:value-type="float" office:value="6.97206" calcext:value-type="float">
            <text:p>6.97206</text:p>
          </table:table-cell>
          <table:table-cell office:value-type="float" office:value="8.41344" calcext:value-type="float">
            <text:p>8.41344</text:p>
          </table:table-cell>
          <table:table-cell office:value-type="float" office:value="9.54868" calcext:value-type="float">
            <text:p>9.54868</text:p>
          </table:table-cell>
          <table:table-cell office:value-type="float" office:value="10.6081" calcext:value-type="float">
            <text:p>10.6081</text:p>
          </table:table-cell>
          <table:table-cell office:value-type="float" office:value="11.1626" calcext:value-type="float">
            <text:p>11.1626</text:p>
          </table:table-cell>
          <table:table-cell office:value-type="float" office:value="11.6113" calcext:value-type="float">
            <text:p>11.6113</text:p>
          </table:table-cell>
          <table:table-cell office:value-type="float" office:value="11.7648" calcext:value-type="float">
            <text:p>11.7648</text:p>
          </table:table-cell>
          <table:table-cell office:value-type="float" office:value="11.8148" calcext:value-type="float">
            <text:p>11.8148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2.99792" calcext:value-type="float">
            <text:p>2.99792</text:p>
          </table:table-cell>
          <table:table-cell office:value-type="float" office:value="5.35229" calcext:value-type="float">
            <text:p>5.35229</text:p>
          </table:table-cell>
          <table:table-cell office:value-type="float" office:value="7.09338" calcext:value-type="float">
            <text:p>7.09338</text:p>
          </table:table-cell>
          <table:table-cell office:value-type="float" office:value="8.71596" calcext:value-type="float">
            <text:p>8.71596</text:p>
          </table:table-cell>
          <table:table-cell office:value-type="float" office:value="9.6723" calcext:value-type="float">
            <text:p>9.6723</text:p>
          </table:table-cell>
          <table:table-cell office:value-type="float" office:value="10.8258" calcext:value-type="float">
            <text:p>10.8258</text:p>
          </table:table-cell>
          <table:table-cell office:value-type="float" office:value="11.8066" calcext:value-type="float">
            <text:p>11.8066</text:p>
          </table:table-cell>
          <table:table-cell office:value-type="float" office:value="12.0128" calcext:value-type="float">
            <text:p>12.0128</text:p>
          </table:table-cell>
          <table:table-cell office:value-type="float" office:value="12.2526" calcext:value-type="float">
            <text:p>12.2526</text:p>
          </table:table-cell>
          <table:table-cell office:value-type="float" office:value="12.4395" calcext:value-type="float">
            <text:p>12.439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74863" calcext:value-type="float">
            <text:p>1.74863</text:p>
          </table:table-cell>
          <table:table-cell office:value-type="float" office:value="4.05135" calcext:value-type="float">
            <text:p>4.05135</text:p>
          </table:table-cell>
          <table:table-cell office:value-type="float" office:value="7.24289" calcext:value-type="float">
            <text:p>7.24289</text:p>
          </table:table-cell>
          <table:table-cell office:value-type="float" office:value="7.12758" calcext:value-type="float">
            <text:p>7.12758</text:p>
          </table:table-cell>
          <table:table-cell office:value-type="float" office:value="7.52808" calcext:value-type="float">
            <text:p>7.52808</text:p>
          </table:table-cell>
          <table:table-cell office:value-type="float" office:value="8.39348" calcext:value-type="float">
            <text:p>8.39348</text:p>
          </table:table-cell>
          <table:table-cell office:value-type="float" office:value="8.72503" calcext:value-type="float">
            <text:p>8.72503</text:p>
          </table:table-cell>
          <table:table-cell office:value-type="float" office:value="8.98472" calcext:value-type="float">
            <text:p>8.98472</text:p>
          </table:table-cell>
          <table:table-cell office:value-type="float" office:value="9.15681" calcext:value-type="float">
            <text:p>9.15681</text:p>
          </table:table-cell>
          <table:table-cell office:value-type="float" office:value="9.15832" calcext:value-type="float">
            <text:p>9.15832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83987" calcext:value-type="float">
            <text:p>1.83987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7.3405" calcext:value-type="float">
            <text:p>7.3405</text:p>
          </table:table-cell>
          <table:table-cell office:value-type="float" office:value="6.98499" calcext:value-type="float">
            <text:p>6.98499</text:p>
          </table:table-cell>
          <table:table-cell office:value-type="float" office:value="7.29247" calcext:value-type="float">
            <text:p>7.29247</text:p>
          </table:table-cell>
          <table:table-cell office:value-type="float" office:value="8.31236" calcext:value-type="float">
            <text:p>8.31236</text:p>
          </table:table-cell>
          <table:table-cell office:value-type="float" office:value="8.93322" calcext:value-type="float">
            <text:p>8.93322</text:p>
          </table:table-cell>
          <table:table-cell office:value-type="float" office:value="9.28888" calcext:value-type="float">
            <text:p>9.28888</text:p>
          </table:table-cell>
          <table:table-cell office:value-type="float" office:value="9.52697" calcext:value-type="float">
            <text:p>9.52697</text:p>
          </table:table-cell>
          <table:table-cell office:value-type="float" office:value="9.56716" calcext:value-type="float">
            <text:p>9.56716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s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1.83996" calcext:value-type="float">
            <text:p>1.83996</text:p>
          </table:table-cell>
          <table:table-cell office:value-type="float" office:value="3.36798" calcext:value-type="float">
            <text:p>3.36798</text:p>
          </table:table-cell>
          <table:table-cell office:value-type="float" office:value="4.95522" calcext:value-type="float">
            <text:p>4.95522</text:p>
          </table:table-cell>
          <table:table-cell office:value-type="float" office:value="5.50072" calcext:value-type="float">
            <text:p>5.50072</text:p>
          </table:table-cell>
          <table:table-cell office:value-type="float" office:value="6.15792" calcext:value-type="float">
            <text:p>6.15792</text:p>
          </table:table-cell>
          <table:table-cell office:value-type="float" office:value="6.83556" calcext:value-type="float">
            <text:p>6.83556</text:p>
          </table:table-cell>
          <table:table-cell office:value-type="float" office:value="7.40367" calcext:value-type="float">
            <text:p>7.40367</text:p>
          </table:table-cell>
          <table:table-cell office:value-type="float" office:value="7.62249" calcext:value-type="float">
            <text:p>7.62249</text:p>
          </table:table-cell>
          <table:table-cell office:value-type="float" office:value="7.77496" calcext:value-type="float">
            <text:p>7.77496</text:p>
          </table:table-cell>
          <table:table-cell office:value-type="float" office:value="7.90923" calcext:value-type="float">
            <text:p>7.9092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63265" calcext:value-type="float">
            <text:p>1.63265</text:p>
          </table:table-cell>
          <table:table-cell office:value-type="float" office:value="3.29769" calcext:value-type="float">
            <text:p>3.29769</text:p>
          </table:table-cell>
          <table:table-cell office:value-type="float" office:value="5.43087" calcext:value-type="float">
            <text:p>5.43087</text:p>
          </table:table-cell>
          <table:table-cell office:value-type="float" office:value="5.63045" calcext:value-type="float">
            <text:p>5.63045</text:p>
          </table:table-cell>
          <table:table-cell office:value-type="float" office:value="6.23557" calcext:value-type="float">
            <text:p>6.23557</text:p>
          </table:table-cell>
          <table:table-cell office:value-type="float" office:value="6.95451" calcext:value-type="float">
            <text:p>6.95451</text:p>
          </table:table-cell>
          <table:table-cell office:value-type="float" office:value="7.34435" calcext:value-type="float">
            <text:p>7.34435</text:p>
          </table:table-cell>
          <table:table-cell office:value-type="float" office:value="7.65189" calcext:value-type="float">
            <text:p>7.65189</text:p>
          </table:table-cell>
          <table:table-cell office:value-type="float" office:value="7.88719" calcext:value-type="float">
            <text:p>7.88719</text:p>
          </table:table-cell>
          <table:table-cell office:value-type="float" office:value="7.94284" calcext:value-type="float">
            <text:p>7.9428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24055" calcext:value-type="float">
            <text:p>1.24055</text:p>
          </table:table-cell>
          <table:table-cell office:value-type="float" office:value="2.27618" calcext:value-type="float">
            <text:p>2.27618</text:p>
          </table:table-cell>
          <table:table-cell office:value-type="float" office:value="4.57491" calcext:value-type="float">
            <text:p>4.57491</text:p>
          </table:table-cell>
          <table:table-cell office:value-type="float" office:value="4.5809" calcext:value-type="float">
            <text:p>4.5809</text:p>
          </table:table-cell>
          <table:table-cell office:value-type="float" office:value="4.87375" calcext:value-type="float">
            <text:p>4.87375</text:p>
          </table:table-cell>
          <table:table-cell office:value-type="float" office:value="5.42667" calcext:value-type="float">
            <text:p>5.42667</text:p>
          </table:table-cell>
          <table:table-cell office:value-type="float" office:value="5.61563" calcext:value-type="float">
            <text:p>5.61563</text:p>
          </table:table-cell>
          <table:table-cell office:value-type="float" office:value="5.83205" calcext:value-type="float">
            <text:p>5.83205</text:p>
          </table:table-cell>
          <table:table-cell office:value-type="float" office:value="5.96822" calcext:value-type="float">
            <text:p>5.96822</text:p>
          </table:table-cell>
          <table:table-cell office:value-type="float" office:value="6.02413" calcext:value-type="float">
            <text:p>6.02413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2492" calcext:value-type="float">
            <text:p>1.2492</text:p>
          </table:table-cell>
          <table:table-cell office:value-type="float" office:value="2.4543" calcext:value-type="float">
            <text:p>2.4543</text:p>
          </table:table-cell>
          <table:table-cell office:value-type="float" office:value="3.8791" calcext:value-type="float">
            <text:p>3.8791</text:p>
          </table:table-cell>
          <table:table-cell office:value-type="float" office:value="4.28004" calcext:value-type="float">
            <text:p>4.28004</text:p>
          </table:table-cell>
          <table:table-cell office:value-type="float" office:value="4.45053" calcext:value-type="float">
            <text:p>4.45053</text:p>
          </table:table-cell>
          <table:table-cell office:value-type="float" office:value="5.12737" calcext:value-type="float">
            <text:p>5.12737</text:p>
          </table:table-cell>
          <table:table-cell office:value-type="float" office:value="5.34004" calcext:value-type="float">
            <text:p>5.34004</text:p>
          </table:table-cell>
          <table:table-cell office:value-type="float" office:value="5.58433" calcext:value-type="float">
            <text:p>5.58433</text:p>
          </table:table-cell>
          <table:table-cell office:value-type="float" office:value="5.63157" calcext:value-type="float">
            <text:p>5.63157</text:p>
          </table:table-cell>
          <table:table-cell office:value-type="float" office:value="5.67236" calcext:value-type="float">
            <text:p>5.67236</text:p>
          </table:table-cell>
        </table:table-row>
        <table:table-row table:style-name="ro2">
          <table:table-cell table:style-name="ce4"/>
          <table:table-cell table:style-name="ce5" table:number-columns-repeated="4"/>
          <table:table-cell table:style-name="ce6" table:number-columns-repeated="6"/>
        </table:table-row>
        <table:table-row table:style-name="ro1">
          <table:table-cell office:value-type="string" calcext:value-type="string">
            <text:p>d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47773" calcext:value-type="float">
            <text:p>6.47773</text:p>
          </table:table-cell>
          <table:table-cell office:value-type="float" office:value="7.7564" calcext:value-type="float">
            <text:p>7.7564</text:p>
          </table:table-cell>
          <table:table-cell office:value-type="float" office:value="7.76228" calcext:value-type="float">
            <text:p>7.76228</text:p>
          </table:table-cell>
          <table:table-cell office:value-type="float" office:value="9.27568" calcext:value-type="float">
            <text:p>9.27568</text:p>
          </table:table-cell>
          <table:table-cell office:value-type="float" office:value="9.80467" calcext:value-type="float">
            <text:p>9.80467</text:p>
          </table:table-cell>
          <table:table-cell office:value-type="float" office:value="10.2662" calcext:value-type="float">
            <text:p>10.2662</text:p>
          </table:table-cell>
          <table:table-cell office:value-type="float" office:value="10.3078" calcext:value-type="float">
            <text:p>10.3078</text:p>
          </table:table-cell>
          <table:table-cell office:value-type="float" office:value="10.4953" calcext:value-type="float">
            <text:p>10.4953</text:p>
          </table:table-cell>
          <table:table-cell office:value-type="float" office:value="10.5911" calcext:value-type="float">
            <text:p>10.5911</text:p>
          </table:table-cell>
          <table:table-cell office:value-type="float" office:value="10.5923" calcext:value-type="float">
            <text:p>10.592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7.41599" calcext:value-type="float">
            <text:p>7.41599</text:p>
          </table:table-cell>
          <table:table-cell office:value-type="float" office:value="10.5929" calcext:value-type="float">
            <text:p>10.5929</text:p>
          </table:table-cell>
          <table:table-cell office:value-type="float" office:value="13.2858" calcext:value-type="float">
            <text:p>13.2858</text:p>
          </table:table-cell>
          <table:table-cell office:value-type="float" office:value="15.8462" calcext:value-type="float">
            <text:p>15.8462</text:p>
          </table:table-cell>
          <table:table-cell office:value-type="float" office:value="18.3453" calcext:value-type="float">
            <text:p>18.3453</text:p>
          </table:table-cell>
          <table:table-cell office:value-type="float" office:value="19.1807" calcext:value-type="float">
            <text:p>19.1807</text:p>
          </table:table-cell>
          <table:table-cell office:value-type="float" office:value="19.8851" calcext:value-type="float">
            <text:p>19.8851</text:p>
          </table:table-cell>
          <table:table-cell office:value-type="float" office:value="19.9499" calcext:value-type="float">
            <text:p>19.9499</text:p>
          </table:table-cell>
          <table:table-cell office:value-type="float" office:value="19.9336" calcext:value-type="float">
            <text:p>19.9336</text:p>
          </table:table-cell>
          <table:table-cell office:value-type="float" office:value="20.2284" calcext:value-type="float">
            <text:p>20.228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5.24161" calcext:value-type="float">
            <text:p>5.24161</text:p>
          </table:table-cell>
          <table:table-cell office:value-type="float" office:value="10.3938" calcext:value-type="float">
            <text:p>10.3938</text:p>
          </table:table-cell>
          <table:table-cell office:value-type="float" office:value="15.7073" calcext:value-type="float">
            <text:p>15.7073</text:p>
          </table:table-cell>
          <table:table-cell office:value-type="float" office:value="15.6839" calcext:value-type="float">
            <text:p>15.6839</text:p>
          </table:table-cell>
          <table:table-cell office:value-type="float" office:value="15.9319" calcext:value-type="float">
            <text:p>15.9319</text:p>
          </table:table-cell>
          <table:table-cell office:value-type="float" office:value="17.844" calcext:value-type="float">
            <text:p>17.844</text:p>
          </table:table-cell>
          <table:table-cell office:value-type="float" office:value="18.0108" calcext:value-type="float">
            <text:p>18.0108</text:p>
          </table:table-cell>
          <table:table-cell office:value-type="float" office:value="17.9557" calcext:value-type="float">
            <text:p>17.9557</text:p>
          </table:table-cell>
          <table:table-cell office:value-type="float" office:value="18.2061" calcext:value-type="float">
            <text:p>18.2061</text:p>
          </table:table-cell>
          <table:table-cell office:value-type="float" office:value="18.2656" calcext:value-type="float">
            <text:p>18.265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6.29611" calcext:value-type="float">
            <text:p>6.29611</text:p>
          </table:table-cell>
          <table:table-cell office:value-type="float" office:value="11.6576" calcext:value-type="float">
            <text:p>11.6576</text:p>
          </table:table-cell>
          <table:table-cell office:value-type="float" office:value="16.3601" calcext:value-type="float">
            <text:p>16.3601</text:p>
          </table:table-cell>
          <table:table-cell office:value-type="float" office:value="16.093" calcext:value-type="float">
            <text:p>16.093</text:p>
          </table:table-cell>
          <table:table-cell office:value-type="float" office:value="17.0018" calcext:value-type="float">
            <text:p>17.0018</text:p>
          </table:table-cell>
          <table:table-cell office:value-type="float" office:value="17.6157" calcext:value-type="float">
            <text:p>17.6157</text:p>
          </table:table-cell>
          <table:table-cell office:value-type="float" office:value="18.5425" calcext:value-type="float">
            <text:p>18.5425</text:p>
          </table:table-cell>
          <table:table-cell office:value-type="float" office:value="18.9417" calcext:value-type="float">
            <text:p>18.9417</text:p>
          </table:table-cell>
          <table:table-cell office:value-type="float" office:value="18.9109" calcext:value-type="float">
            <text:p>18.9109</text:p>
          </table:table-cell>
          <table:table-cell office:value-type="float" office:value="18.9008" calcext:value-type="float">
            <text:p>18.9008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d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4.67015" calcext:value-type="float">
            <text:p>4.67015</text:p>
          </table:table-cell>
          <table:table-cell office:value-type="float" office:value="6.49581" calcext:value-type="float">
            <text:p>6.49581</text:p>
          </table:table-cell>
          <table:table-cell office:value-type="float" office:value="7.86165" calcext:value-type="float">
            <text:p>7.86165</text:p>
          </table:table-cell>
          <table:table-cell office:value-type="float" office:value="8.67576" calcext:value-type="float">
            <text:p>8.67576</text:p>
          </table:table-cell>
          <table:table-cell office:value-type="float" office:value="9.52292" calcext:value-type="float">
            <text:p>9.52292</text:p>
          </table:table-cell>
          <table:table-cell office:value-type="float" office:value="10.1962" calcext:value-type="float">
            <text:p>10.1962</text:p>
          </table:table-cell>
          <table:table-cell office:value-type="float" office:value="10.3305" calcext:value-type="float">
            <text:p>10.3305</text:p>
          </table:table-cell>
          <table:table-cell office:value-type="float" office:value="10.5117" calcext:value-type="float">
            <text:p>10.5117</text:p>
          </table:table-cell>
          <table:table-cell office:value-type="float" office:value="10.5011" calcext:value-type="float">
            <text:p>10.5011</text:p>
          </table:table-cell>
          <table:table-cell office:value-type="float" office:value="10.5851" calcext:value-type="float">
            <text:p>10.5851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28591" calcext:value-type="float">
            <text:p>5.28591</text:p>
          </table:table-cell>
          <table:table-cell office:value-type="float" office:value="8.68137" calcext:value-type="float">
            <text:p>8.68137</text:p>
          </table:table-cell>
          <table:table-cell office:value-type="float" office:value="11.1678" calcext:value-type="float">
            <text:p>11.1678</text:p>
          </table:table-cell>
          <table:table-cell office:value-type="float" office:value="13.2766" calcext:value-type="float">
            <text:p>13.2766</text:p>
          </table:table-cell>
          <table:table-cell office:value-type="float" office:value="15.2996" calcext:value-type="float">
            <text:p>15.2996</text:p>
          </table:table-cell>
          <table:table-cell office:value-type="float" office:value="17.0201" calcext:value-type="float">
            <text:p>17.0201</text:p>
          </table:table-cell>
          <table:table-cell office:value-type="float" office:value="17.7594" calcext:value-type="float">
            <text:p>17.7594</text:p>
          </table:table-cell>
          <table:table-cell office:value-type="float" office:value="18.0598" calcext:value-type="float">
            <text:p>18.0598</text:p>
          </table:table-cell>
          <table:table-cell office:value-type="float" office:value="18.6289" calcext:value-type="float">
            <text:p>18.6289</text:p>
          </table:table-cell>
          <table:table-cell office:value-type="float" office:value="18.6597" calcext:value-type="float">
            <text:p>18.659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4.52307" calcext:value-type="float">
            <text:p>4.52307</text:p>
          </table:table-cell>
          <table:table-cell office:value-type="float" office:value="9.04993" calcext:value-type="float">
            <text:p>9.04993</text:p>
          </table:table-cell>
          <table:table-cell office:value-type="float" office:value="11.6549" calcext:value-type="float">
            <text:p>11.6549</text:p>
          </table:table-cell>
          <table:table-cell office:value-type="float" office:value="12.5127" calcext:value-type="float">
            <text:p>12.5127</text:p>
          </table:table-cell>
          <table:table-cell office:value-type="float" office:value="12.8627" calcext:value-type="float">
            <text:p>12.8627</text:p>
          </table:table-cell>
          <table:table-cell office:value-type="float" office:value="14.1497" calcext:value-type="float">
            <text:p>14.1497</text:p>
          </table:table-cell>
          <table:table-cell office:value-type="float" office:value="14.449" calcext:value-type="float">
            <text:p>14.449</text:p>
          </table:table-cell>
          <table:table-cell office:value-type="float" office:value="14.8939" calcext:value-type="float">
            <text:p>14.8939</text:p>
          </table:table-cell>
          <table:table-cell office:value-type="float" office:value="15.0142" calcext:value-type="float">
            <text:p>15.0142</text:p>
          </table:table-cell>
          <table:table-cell office:value-type="float" office:value="15.0697" calcext:value-type="float">
            <text:p>15.0697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8.90261" calcext:value-type="float">
            <text:p>8.90261</text:p>
          </table:table-cell>
          <table:table-cell office:value-type="float" office:value="12.1471" calcext:value-type="float">
            <text:p>12.1471</text:p>
          </table:table-cell>
          <table:table-cell office:value-type="float" office:value="11.581" calcext:value-type="float">
            <text:p>11.581</text:p>
          </table:table-cell>
          <table:table-cell office:value-type="float" office:value="12.2322" calcext:value-type="float">
            <text:p>12.2322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14.7338" calcext:value-type="float">
            <text:p>14.7338</text:p>
          </table:table-cell>
          <table:table-cell office:value-type="float" office:value="15.0859" calcext:value-type="float">
            <text:p>15.0859</text:p>
          </table:table-cell>
          <table:table-cell office:value-type="float" office:value="15.1419" calcext:value-type="float">
            <text:p>15.1419</text:p>
          </table:table-cell>
          <table:table-cell office:value-type="float" office:value="15.186" calcext:value-type="float">
            <text:p>15.186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d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89818" calcext:value-type="float">
            <text:p>2.89818</text:p>
          </table:table-cell>
          <table:table-cell office:value-type="float" office:value="4.86322" calcext:value-type="float">
            <text:p>4.86322</text:p>
          </table:table-cell>
          <table:table-cell office:value-type="float" office:value="6.13031" calcext:value-type="float">
            <text:p>6.13031</text:p>
          </table:table-cell>
          <table:table-cell office:value-type="float" office:value="7.36714" calcext:value-type="float">
            <text:p>7.36714</text:p>
          </table:table-cell>
          <table:table-cell office:value-type="float" office:value="8.3967" calcext:value-type="float">
            <text:p>8.3967</text:p>
          </table:table-cell>
          <table:table-cell office:value-type="float" office:value="8.85641" calcext:value-type="float">
            <text:p>8.85641</text:p>
          </table:table-cell>
          <table:table-cell office:value-type="float" office:value="9.19336" calcext:value-type="float">
            <text:p>9.19336</text:p>
          </table:table-cell>
          <table:table-cell office:value-type="float" office:value="9.40994" calcext:value-type="float">
            <text:p>9.40994</text:p>
          </table:table-cell>
          <table:table-cell office:value-type="float" office:value="9.52891" calcext:value-type="float">
            <text:p>9.52891</text:p>
          </table:table-cell>
          <table:table-cell office:value-type="float" office:value="9.58223" calcext:value-type="float">
            <text:p>9.5822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51359" calcext:value-type="float">
            <text:p>3.51359</text:p>
          </table:table-cell>
          <table:table-cell office:value-type="float" office:value="5.67785" calcext:value-type="float">
            <text:p>5.67785</text:p>
          </table:table-cell>
          <table:table-cell office:value-type="float" office:value="7.95278" calcext:value-type="float">
            <text:p>7.95278</text:p>
          </table:table-cell>
          <table:table-cell office:value-type="float" office:value="9.39549" calcext:value-type="float">
            <text:p>9.39549</text:p>
          </table:table-cell>
          <table:table-cell office:value-type="float" office:value="10.7152" calcext:value-type="float">
            <text:p>10.7152</text:p>
          </table:table-cell>
          <table:table-cell office:value-type="float" office:value="12.1123" calcext:value-type="float">
            <text:p>12.1123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13.15" calcext:value-type="float">
            <text:p>13.15</text:p>
          </table:table-cell>
          <table:table-cell office:value-type="float" office:value="13.3355" calcext:value-type="float">
            <text:p>13.3355</text:p>
          </table:table-cell>
          <table:table-cell office:value-type="float" office:value="13.4337" calcext:value-type="float">
            <text:p>13.433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45023" calcext:value-type="float">
            <text:p>2.45023</text:p>
          </table:table-cell>
          <table:table-cell office:value-type="float" office:value="5.46892" calcext:value-type="float">
            <text:p>5.46892</text:p>
          </table:table-cell>
          <table:table-cell office:value-type="float" office:value="9.44013" calcext:value-type="float">
            <text:p>9.44013</text:p>
          </table:table-cell>
          <table:table-cell office:value-type="float" office:value="9.07346" calcext:value-type="float">
            <text:p>9.07346</text:p>
          </table:table-cell>
          <table:table-cell office:value-type="float" office:value="9.45452" calcext:value-type="float">
            <text:p>9.45452</text:p>
          </table:table-cell>
          <table:table-cell office:value-type="float" office:value="10.4653" calcext:value-type="float">
            <text:p>10.4653</text:p>
          </table:table-cell>
          <table:table-cell office:value-type="float" office:value="11.0504" calcext:value-type="float">
            <text:p>11.0504</text:p>
          </table:table-cell>
          <table:table-cell office:value-type="float" office:value="11.5343" calcext:value-type="float">
            <text:p>11.5343</text:p>
          </table:table-cell>
          <table:table-cell office:value-type="float" office:value="11.7414" calcext:value-type="float">
            <text:p>11.7414</text:p>
          </table:table-cell>
          <table:table-cell office:value-type="float" office:value="11.7874" calcext:value-type="float">
            <text:p>11.787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93854" calcext:value-type="float">
            <text:p>2.93854</text:p>
          </table:table-cell>
          <table:table-cell office:value-type="float" office:value="5.46695" calcext:value-type="float">
            <text:p>5.46695</text:p>
          </table:table-cell>
          <table:table-cell office:value-type="float" office:value="7.70566" calcext:value-type="float">
            <text:p>7.70566</text:p>
          </table:table-cell>
          <table:table-cell office:value-type="float" office:value="7.66942" calcext:value-type="float">
            <text:p>7.66942</text:p>
          </table:table-cell>
          <table:table-cell office:value-type="float" office:value="8.42799" calcext:value-type="float">
            <text:p>8.42799</text:p>
          </table:table-cell>
          <table:table-cell office:value-type="float" office:value="9.54637" calcext:value-type="float">
            <text:p>9.54637</text:p>
          </table:table-cell>
          <table:table-cell office:value-type="float" office:value="10.4754" calcext:value-type="float">
            <text:p>10.4754</text:p>
          </table:table-cell>
          <table:table-cell office:value-type="float" office:value="10.795" calcext:value-type="float">
            <text:p>10.795</text:p>
          </table:table-cell>
          <table:table-cell office:value-type="float" office:value="11.103" calcext:value-type="float">
            <text:p>11.103</text:p>
          </table:table-cell>
          <table:table-cell office:value-type="float" office:value="11.1417" calcext:value-type="float">
            <text:p>11.141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<text:span text:style-name="T2">d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1.74299" calcext:value-type="float">
            <text:p>1.74299</text:p>
          </table:table-cell>
          <table:table-cell office:value-type="float" office:value="3.20404" calcext:value-type="float">
            <text:p>3.20404</text:p>
          </table:table-cell>
          <table:table-cell office:value-type="float" office:value="4.24417" calcext:value-type="float">
            <text:p>4.24417</text:p>
          </table:table-cell>
          <table:table-cell office:value-type="float" office:value="4.69384" calcext:value-type="float">
            <text:p>4.69384</text:p>
          </table:table-cell>
          <table:table-cell office:value-type="float" office:value="5.48803" calcext:value-type="float">
            <text:p>5.48803</text:p>
          </table:table-cell>
          <table:table-cell office:value-type="float" office:value="5.91936" calcext:value-type="float">
            <text:p>5.91936</text:p>
          </table:table-cell>
          <table:table-cell office:value-type="float" office:value="6.17785" calcext:value-type="float">
            <text:p>6.17785</text:p>
          </table:table-cell>
          <table:table-cell office:value-type="float" office:value="6.36752" calcext:value-type="float">
            <text:p>6.36752</text:p>
          </table:table-cell>
          <table:table-cell office:value-type="float" office:value="6.44736" calcext:value-type="float">
            <text:p>6.44736</text:p>
          </table:table-cell>
          <table:table-cell office:value-type="float" office:value="6.44434" calcext:value-type="float">
            <text:p>6.44434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81689" calcext:value-type="float">
            <text:p>1.81689</text:p>
          </table:table-cell>
          <table:table-cell office:value-type="float" office:value="3.7405" calcext:value-type="float">
            <text:p>3.7405</text:p>
          </table:table-cell>
          <table:table-cell office:value-type="float" office:value="5.77162" calcext:value-type="float">
            <text:p>5.77162</text:p>
          </table:table-cell>
          <table:table-cell office:value-type="float" office:value="6.11818" calcext:value-type="float">
            <text:p>6.11818</text:p>
          </table:table-cell>
          <table:table-cell office:value-type="float" office:value="6.79857" calcext:value-type="float">
            <text:p>6.79857</text:p>
          </table:table-cell>
          <table:table-cell office:value-type="float" office:value="7.45948" calcext:value-type="float">
            <text:p>7.45948</text:p>
          </table:table-cell>
          <table:table-cell office:value-type="float" office:value="7.80957" calcext:value-type="float">
            <text:p>7.80957</text:p>
          </table:table-cell>
          <table:table-cell office:value-type="float" office:value="8.04965" calcext:value-type="float">
            <text:p>8.04965</text:p>
          </table:table-cell>
          <table:table-cell office:value-type="float" office:value="8.13098" calcext:value-type="float">
            <text:p>8.13098</text:p>
          </table:table-cell>
          <table:table-cell office:value-type="float" office:value="8.13286" calcext:value-type="float">
            <text:p>8.13286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44014" calcext:value-type="float">
            <text:p>1.44014</text:p>
          </table:table-cell>
          <table:table-cell office:value-type="float" office:value="3.47826" calcext:value-type="float">
            <text:p>3.47826</text:p>
          </table:table-cell>
          <table:table-cell office:value-type="float" office:value="5.89677" calcext:value-type="float">
            <text:p>5.89677</text:p>
          </table:table-cell>
          <table:table-cell office:value-type="float" office:value="5.67033" calcext:value-type="float">
            <text:p>5.67033</text:p>
          </table:table-cell>
          <table:table-cell office:value-type="float" office:value="6.02956" calcext:value-type="float">
            <text:p>6.02956</text:p>
          </table:table-cell>
          <table:table-cell office:value-type="float" office:value="6.94313" calcext:value-type="float">
            <text:p>6.94313</text:p>
          </table:table-cell>
          <table:table-cell office:value-type="float" office:value="7.47653" calcext:value-type="float">
            <text:p>7.47653</text:p>
          </table:table-cell>
          <table:table-cell office:value-type="float" office:value="7.72164" calcext:value-type="float">
            <text:p>7.72164</text:p>
          </table:table-cell>
          <table:table-cell office:value-type="float" office:value="7.87533" calcext:value-type="float">
            <text:p>7.87533</text:p>
          </table:table-cell>
          <table:table-cell office:value-type="float" office:value="7.90037" calcext:value-type="float">
            <text:p>7.90037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38189" calcext:value-type="float">
            <text:p>1.38189</text:p>
          </table:table-cell>
          <table:table-cell office:value-type="float" office:value="3.03533" calcext:value-type="float">
            <text:p>3.03533</text:p>
          </table:table-cell>
          <table:table-cell office:value-type="float" office:value="4.74478" calcext:value-type="float">
            <text:p>4.74478</text:p>
          </table:table-cell>
          <table:table-cell office:value-type="float" office:value="4.69251" calcext:value-type="float">
            <text:p>4.69251</text:p>
          </table:table-cell>
          <table:table-cell office:value-type="float" office:value="5.21028" calcext:value-type="float">
            <text:p>5.21028</text:p>
          </table:table-cell>
          <table:table-cell office:value-type="float" office:value="5.85261" calcext:value-type="float">
            <text:p>5.85261</text:p>
          </table:table-cell>
          <table:table-cell office:value-type="float" office:value="6.2025" calcext:value-type="float">
            <text:p>6.2025</text:p>
          </table:table-cell>
          <table:table-cell office:value-type="float" office:value="6.40101" calcext:value-type="float">
            <text:p>6.40101</text:p>
          </table:table-cell>
          <table:table-cell office:value-type="float" office:value="6.459" calcext:value-type="float">
            <text:p>6.459</text:p>
          </table:table-cell>
          <table:table-cell office:value-type="float" office:value="6.45396" calcext:value-type="float">
            <text:p>6.4539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2nd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44681" calcext:value-type="float">
            <text:p>5.44681</text:p>
          </table:table-cell>
          <table:table-cell office:value-type="float" office:value="7.24392" calcext:value-type="float">
            <text:p>7.24392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3498" calcext:value-type="float">
            <text:p>13.3498</text:p>
          </table:table-cell>
          <table:table-cell office:value-type="float" office:value="15.2933" calcext:value-type="float">
            <text:p>15.2933</text:p>
          </table:table-cell>
          <table:table-cell office:value-type="float" office:value="16.8568" calcext:value-type="float">
            <text:p>16.8568</text:p>
          </table:table-cell>
          <table:table-cell office:value-type="float" office:value="17.294" calcext:value-type="float">
            <text:p>17.294</text:p>
          </table:table-cell>
          <table:table-cell office:value-type="float" office:value="17.7365" calcext:value-type="float">
            <text:p>17.7365</text:p>
          </table:table-cell>
          <table:table-cell office:value-type="float" office:value="17.9494" calcext:value-type="float">
            <text:p>17.9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4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21697" calcext:value-type="float">
            <text:p>5.21697</text:p>
          </table:table-cell>
          <table:table-cell office:value-type="float" office:value="7.71782" calcext:value-type="float">
            <text:p>7.71782</text:p>
          </table:table-cell>
          <table:table-cell office:value-type="float" office:value="7.86603" calcext:value-type="float">
            <text:p>7.86603</text:p>
          </table:table-cell>
          <table:table-cell office:value-type="float" office:value="9.3218" calcext:value-type="float">
            <text:p>9.3218</text:p>
          </table:table-cell>
          <table:table-cell office:value-type="float" office:value="10.4443" calcext:value-type="float">
            <text:p>10.4443</text:p>
          </table:table-cell>
          <table:table-cell office:value-type="float" office:value="12.1306" calcext:value-type="float">
            <text:p>12.1306</text:p>
          </table:table-cell>
          <table:table-cell office:value-type="float" office:value="12.5506" calcext:value-type="float">
            <text:p>12.5506</text:p>
          </table:table-cell>
          <table:table-cell office:value-type="float" office:value="12.9429" calcext:value-type="float">
            <text:p>12.9429</text:p>
          </table:table-cell>
          <table:table-cell office:value-type="float" office:value="13.1355" calcext:value-type="float">
            <text:p>13.1355</text:p>
          </table:table-cell>
          <table:table-cell office:value-type="float" office:value="13.3201" calcext:value-type="float">
            <text:p>13.320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8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93791" calcext:value-type="float">
            <text:p>2.93791</text:p>
          </table:table-cell>
          <table:table-cell office:value-type="float" office:value="4.79763" calcext:value-type="float">
            <text:p>4.79763</text:p>
          </table:table-cell>
          <table:table-cell office:value-type="float" office:value="5.32335" calcext:value-type="float">
            <text:p>5.32335</text:p>
          </table:table-cell>
          <table:table-cell office:value-type="float" office:value="5.9967" calcext:value-type="float">
            <text:p>5.9967</text:p>
          </table:table-cell>
          <table:table-cell office:value-type="float" office:value="6.75829" calcext:value-type="float">
            <text:p>6.75829</text:p>
          </table:table-cell>
          <table:table-cell office:value-type="float" office:value="7.00508" calcext:value-type="float">
            <text:p>7.00508</text:p>
          </table:table-cell>
          <table:table-cell office:value-type="float" office:value="7.25091" calcext:value-type="float">
            <text:p>7.25091</text:p>
          </table:table-cell>
          <table:table-cell office:value-type="float" office:value="7.28586" calcext:value-type="float">
            <text:p>7.28586</text:p>
          </table:table-cell>
          <table:table-cell office:value-type="float" office:value="7.18035" calcext:value-type="float">
            <text:p>7.18035</text:p>
          </table:table-cell>
          <table:table-cell office:value-type="float" office:value="7.0558" calcext:value-type="float">
            <text:p>7.0558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lr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22:52:02.028120638</meta:creation-date>
    <dc:date>2026-07-17T10:45:26.285645765</dc:date>
    <meta:editing-duration>PT11H16M19S</meta:editing-duration>
    <meta:editing-cycles>284</meta:editing-cycles>
    <meta:generator>LibreOffice/24.2.7.2$Linux_X86_64 LibreOffice_project/420$Build-2</meta:generator>
    <meta:document-statistic meta:table-count="1" meta:cell-count="780" meta:object-count="0"/>
  </office:meta>
</office:document-meta>
</file>